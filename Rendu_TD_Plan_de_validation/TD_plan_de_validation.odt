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47f69"/>
    </style:style>
    <style:style style:name="P2" style:family="paragraph" style:parent-style-name="Heading_20_1">
      <style:text-properties officeooo:paragraph-rsid="00147f69"/>
    </style:style>
    <style:style style:name="P3" style:family="paragraph" style:parent-style-name="Standard">
      <style:text-properties officeooo:rsid="00147f69" officeooo:paragraph-rsid="00147f69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paragraph-rsid="00147f69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officeooo:paragraph-rsid="00147f69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text-properties officeooo:paragraph-rsid="00147f69"/>
    </style:style>
    <style:style style:name="P11" style:family="paragraph" style:parent-style-name="Text_20_body">
      <style:text-properties officeooo:rsid="00147f69" officeooo:paragraph-rsid="00147f69"/>
    </style:style>
    <style:style style:name="P12" style:family="paragraph" style:parent-style-name="Text_20_body" style:list-style-name="L3">
      <style:text-properties officeooo:rsid="00147f69" officeooo:paragraph-rsid="00147f69"/>
    </style:style>
    <style:style style:name="P13" style:family="paragraph" style:parent-style-name="Text_20_body" style:list-style-name="L7">
      <style:text-properties officeooo:rsid="00147f69" officeooo:paragraph-rsid="00147f69"/>
    </style:style>
    <style:style style:name="P14" style:family="paragraph" style:parent-style-name="Text_20_body">
      <style:text-properties fo:font-style="normal" officeooo:rsid="00147f69" officeooo:paragraph-rsid="00147f69" style:font-style-asian="normal" style:font-style-complex="normal"/>
    </style:style>
    <style:style style:name="P15" style:family="paragraph" style:parent-style-name="Text_20_body">
      <style:text-properties officeooo:paragraph-rsid="00147f69"/>
    </style:style>
    <style:style style:name="P16" style:family="paragraph" style:parent-style-name="Text_20_body" style:list-style-name="L6">
      <style:text-properties officeooo:paragraph-rsid="00147f69"/>
    </style:style>
    <style:style style:name="T1" style:family="text">
      <style:text-properties officeooo:rsid="00147f6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7f6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7f69" style:font-style-asian="normal" style:font-style-complex="normal"/>
    </style:style>
    <style:style style:name="T6" style:family="text">
      <style:text-properties style:font-name="Liberation Serif" fo:font-style="normal" officeooo:rsid="00147f69" style:font-name-asian="Liberation Serif" style:font-style-asian="normal" style:font-name-complex="Liberation Serif" style:font-style-complex="normal"/>
    </style:style>
    <style:style style:name="T7" style:family="text">
      <style:text-properties style:font-name="Liberation Serif" fo:font-style="italic" officeooo:rsid="00147f69" style:font-name-asian="Liberation Serif" style:font-style-asian="italic" style:font-name-complex="Liberation Serif" style:font-style-complex="italic"/>
    </style:style>
    <style:style style:name="T8" style:family="text">
      <style:text-properties style:font-name="Liberation Serif1" fo:font-style="italic" officeooo:rsid="00147f69" style:font-name-asian="NSimSun" style:font-style-asian="italic" style:font-name-complex="Arial1" style:font-style-complex="italic"/>
    </style:style>
    <style:style style:name="T9" style:family="text">
      <style:text-properties style:font-name="Liberation Serif1" fo:font-style="normal" officeooo:rsid="00147f69" style:font-name-asian="NSimSun" style:font-style-asian="normal" style:font-name-complex="Arial1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D – </text:span>Plan de validation – Compteur</text:p>
      <text:p text:style-name="P3"/>
      <text:p text:style-name="P3"/>
      <text:h text:style-name="Heading_20_1" text:outline-level="1">Inspection</text:h>
      <text:p text:style-name="Text_20_body"/>
      <text:p text:style-name="Text_20_body">Vérification du schéma RTL :</text:p>
      <text:list text:style-name="L2">
        <text:list-item>
          <text:p text:style-name="P4">Logique du sous-bloc « compteur » : incrémentation, comparaison pour savoir qu’on a atteint la cible, condition et valeur de réinitialisation.</text:p>
        </text:list-item>
        <text:list-item>
          <text:p text:style-name="P4">Logique du sous-bloc « led » : détection de front montant et bascule du signal led.</text:p>
        </text:list-item>
        <text:list-item>
          <text:p text:style-name="P4">Entrées-sorties.</text:p>
        </text:list-item>
        <text:list-item>
          <text:p text:style-name="P4">Vérification du calcul de détermination des constantes (ici le nombre de périodes d’horloge dans un cycle du compteur).</text:p>
        </text:list-item>
      </text:list>
      <text:p text:style-name="Text_20_body"/>
      <text:p text:style-name="Text_20_body">Vérification du code VHDL :</text:p>
      <text:list text:style-name="L3">
        <text:list-item>
          <text:p text:style-name="P5">Définition des entrées, sorties et signaux internes.</text:p>
        </text:list-item>
        <text:list-item>
          <text:p text:style-name="P6">Présence et vérification dans le code des équations logiques correspondant à chaque élément du schéma RTL <text:span text:style-name="T1">(registres, incrémenteur, tests conditionnel et multiplexeurs).</text:span></text:p>
        </text:list-item>
        <text:list-item>
          <text:p text:style-name="P12">Vérifier que les logiques séquentielles et combinatoires du code.</text:p>
        </text:list-item>
      </text:list>
      <text:p text:style-name="P11"/>
      <text:h text:style-name="P2" text:outline-level="1">Analyse</text:h>
      <text:p text:style-name="Text_20_body"/>
      <text:p text:style-name="Text_20_body">Simulation par testbench du fonctionnement « normal » du compteur :</text:p>
      <text:list xml:id="list2665486730" text:style-name="L4">
        <text:list-item>
          <text:p text:style-name="P7">Vérifier le respect timing du déclenchement puis de la réinitialisation de la sortie <text:span text:style-name="T2">end_counter</text:span><text:span text:style-name="T4"> <text:line-break/><text:tab/></text:span><text:span text:style-name="T6">→ </text:span><text:span text:style-name="T8">end_counter</text:span><text:span text:style-name="T9"> doit être à ‘1’ pendant un battement d’horloge toutes les 2 secondes, <text:tab/>et à ‘0’ le reste du temps.</text:span></text:p>
        </text:list-item>
        <text:list-item>
          <text:p text:style-name="P8">Vérifier le timing et l’alternance d’état de la sortie <text:span text:style-name="T2">led</text:span><text:span text:style-name="T4"> <text:line-break/><text:tab/></text:span><text:span text:style-name="T6">→ </text:span><text:span text:style-name="T7">led</text:span><text:span text:style-name="T6"> est initialement ‘0’, observe une première bascule vers ‘1’ à t = <text:tab/>2,000 000 010 s (un batement d’horloge après le premier pic de </text:span><text:span text:style-name="T7">end_counter</text:span><text:span text:style-name="T6">), puis <text:tab/>ensuite bascule toutes les 2 secondes.</text:span></text:p>
        </text:list-item>
      </text:list>
      <text:p text:style-name="Text_20_body"/>
      <text:p text:style-name="Text_20_body">Simulation par testbench de l’interruption par <text:span text:style-name="T2">restart</text:span> du fonctionnement « normal », à un moment où la LED est allumée :</text:p>
      <text:list text:style-name="L5">
        <text:list-item>
          <text:p text:style-name="P9"><text:soft-page-break/>Vérifier que la sortie <text:span text:style-name="T2">led </text:span>repasse à ‘0’ au moment du <text:span text:style-name="T2">restart.</text:span></text:p>
        </text:list-item>
        <text:list-item>
          <text:p text:style-name="P10">Vérifier que le cycle reprends de zéro à partir du relâchement de l’entrée <text:span text:style-name="T2">restart</text:span>, en vérifiant le respect du timing du déclenchement puis de la réinitialisation de la sortie <text:span text:style-name="T2">end_counter,</text:span> ainsi que le respect du timing de réallumage de la sortie <text:span text:style-name="T2">led</text:span><text:span text:style-name="T4"> <text:line-break/><text:tab/></text:span><text:span text:style-name="T6">→ 2 secondes après le passage de l’entrée </text:span><text:span text:style-name="T7">restart</text:span><text:span text:style-name="T6"> à ‘0’, </text:span><text:span text:style-name="T7">end_counter</text:span><text:span text:style-name="T6"> doit valoir ‘1’,<text:line-break/><text:tab/>et repasser à ‘0’ à partir du batement d’horloge suivant ;<text:line-break/><text:tab/>→ 2,000 000 010 s après le passage de l’entrée </text:span><text:span text:style-name="T7">restart</text:span><text:span text:style-name="T6"> à ‘0’, </text:span><text:span text:style-name="T7">led</text:span><text:span text:style-name="T6"> doit prendre la <text:tab/>valeur ‘1’.</text:span></text:p>
        </text:list-item>
      </text:list>
      <text:p text:style-name="P3"/>
      <text:h text:style-name="Heading_20_1" text:outline-level="1">Test</text:h>
      <text:p text:style-name="Text_20_body"/>
      <text:p text:style-name="Text_20_body">Placer des sondes <text:span text:style-name="T1">ILA sur l’entrée </text:span><text:span text:style-name="T3">restart</text:span><text:span text:style-name="T5"> et sur les sorties </text:span><text:span text:style-name="T3">led</text:span><text:span text:style-name="T5"> et </text:span><text:span text:style-name="T3">end_counter.</text:span></text:p>
      <text:p text:style-name="P14"/>
      <text:p text:style-name="P14">Vérifier le fonctionnement « normal » du compteur :</text:p>
      <text:list text:continue-list="list2665486730" text:style-name="L4">
        <text:list-item>
          <text:p text:style-name="P8">Vérifier le respect timing du déclenchement puis de la réinitialisation de la sortie <text:span text:style-name="T2">end_counter<text:line-break/></text:span><text:span text:style-name="T4"><text:tab/></text:span><text:span text:style-name="T6">→ </text:span><text:span text:style-name="T8">end_counter</text:span><text:span text:style-name="T9"> doit être à ‘1’ pendant un battement d’horloge toutes les 2 secondes, <text:tab/>et à ‘0’ le reste du temps.</text:span></text:p>
        </text:list-item>
        <text:list-item>
          <text:p text:style-name="P8">Vérifier le timing et l’alternance d’état de la sortie <text:span text:style-name="T2">led<text:line-break/><text:tab/></text:span><text:span text:style-name="T6">→ </text:span><text:span text:style-name="T7">led</text:span><text:span text:style-name="T6"> est initialement ‘0’, observe une première bascule vers ‘1’ à t = <text:tab/>2,000 000 010 s (un batement d’horloge après le premier pic de </text:span><text:span text:style-name="T7">end_counter</text:span><text:span text:style-name="T6">), puis <text:tab/>ensuite bascule toutes les 2 secondes.</text:span></text:p>
        </text:list-item>
      </text:list>
      <text:p text:style-name="P14"/>
      <text:p text:style-name="P14">Vérifier l’action du bouton <text:span text:style-name="T2">restart </text:span>: </text:p>
      <text:list text:style-name="L6">
        <text:list-item>
          <text:p text:style-name="P16"><text:span text:style-name="T5">Presser le bouton à un moment où la led est allumée.</text:span></text:p>
        </text:list-item>
        <text:list-item>
          <text:p text:style-name="P16"><text:span text:style-name="T5">Vérifier que la sortie </text:span><text:span text:style-name="T3">led </text:span><text:span text:style-name="T5">repasse à ‘0’.</text:span></text:p>
        </text:list-item>
        <text:list-item>
          <text:p text:style-name="P16"><text:span text:style-name="T5">Vérifier que le cycle reprends de zéro à partir du relâchement de l’entrée </text:span><text:span text:style-name="T3">restart</text:span><text:span text:style-name="T5">, en vérifiant le respect du timing du déclenchement puis de la réinitialisation de la sortie </text:span><text:span text:style-name="T3">end_counter,</text:span><text:span text:style-name="T5"> ainsi que le respect du timing de réallumage de la sortie </text:span><text:span text:style-name="T3">led<text:line-break/><text:tab/></text:span><text:span text:style-name="T6">→ 2 secondes après le passage de l’entrée </text:span><text:span text:style-name="T7">restart</text:span><text:span text:style-name="T6"> à ‘0’, </text:span><text:span text:style-name="T7">end_counter</text:span><text:span text:style-name="T6"> doit valoir ‘1’,<text:line-break/><text:tab/>et repasser à ‘0’ à partir du batement d’horloge suivant ;<text:line-break/><text:tab/>→ 2,000 000 010 s après le passage de l’entrée </text:span><text:span text:style-name="T7">restart</text:span><text:span text:style-name="T6"> à ‘0’, </text:span><text:span text:style-name="T7">led</text:span><text:span text:style-name="T6"> doit prendre la <text:tab/>valeur ‘1’.</text:span></text:p>
        </text:list-item>
      </text:list>
      <text:p text:style-name="P3"/>
      <text:h text:style-name="Heading_20_1" text:outline-level="1">Démonstration</text:h>
      <text:p text:style-name="P15"/>
      <text:p text:style-name="P15"><text:span text:style-name="T1">Vérifier visuellement le fonctionnement de la carte, en observant le fonctionnement de la LED :</text:span></text:p>
      <text:list text:style-name="L7">
        <text:list-item>
          <text:p text:style-name="P13"><text:soft-page-break/>Sans action extérieure, la LED doit clignoter, en alternant des périodes de 2 secondes où elle est éteinte, et de 2 secondes où elle est allumée.</text:p>
        </text:list-item>
        <text:list-item>
          <text:p text:style-name="P13">Lorsque le bouton est appuyé, la LED doit immédiatement s’éteindre si elle était allumée</text:p>
        </text:list-item>
        <text:list-item>
          <text:p text:style-name="P13">À partir du moment où le bouton est relâché, le cycle de clignotement doit reprendre, en commençant par une période de 2 secondes où la LED reste étei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7T11:38:30.696000000</meta:creation-date>
    <dc:date>2026-07-07T12:31:54.348000000</dc:date>
    <meta:editing-duration>PT53M23S</meta:editing-duration>
    <meta:editing-cycles>1</meta:editing-cycles>
    <meta:document-statistic meta:table-count="0" meta:image-count="0" meta:object-count="0" meta:page-count="3" meta:paragraph-count="32" meta:word-count="639" meta:character-count="3699" meta:non-whitespace-character-count="3087"/>
    <meta:generator>LibreOffice/7.5.8.2$Windows_X86_64 LibreOffice_project/f718d63693263970429a68f568db6046aaa9df01</meta:generator>
  </office:meta>
</office:document-meta>
</file>