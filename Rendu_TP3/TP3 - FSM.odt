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70000002276956DB338947397.png" manifest:media-type="image/png"/>
  <manifest:file-entry manifest:full-path="Pictures/1000000000000642000001811D742E0077AC6FC3.png" manifest:media-type="image/png"/>
  <manifest:file-entry manifest:full-path="Pictures/100000000000015400000038C4973926BAD80354.png" manifest:media-type="image/png"/>
  <manifest:file-entry manifest:full-path="Pictures/10000001000004CE00000194AFF02C914AF10355.png" manifest:media-type="image/png"/>
  <manifest:file-entry manifest:full-path="Pictures/10000000000005860000014159CD6D2BC93283A3.png" manifest:media-type="image/png"/>
  <manifest:file-entry manifest:full-path="Pictures/100000010000041000000231352C4ED0B1AE90DD.png" manifest:media-type="image/png"/>
  <manifest:file-entry manifest:full-path="Pictures/100000010000023200000231A5B461156298948D.png" manifest:media-type="image/png"/>
  <manifest:file-entry manifest:full-path="Pictures/100000000000012B000001BED33FA9FE54F64459.png" manifest:media-type="image/png"/>
  <manifest:file-entry manifest:full-path="Pictures/10000000000005500000017E662F124260A66FF5.png" manifest:media-type="image/png"/>
  <manifest:file-entry manifest:full-path="Pictures/100000000000012D00000478768A20E4427D5587.png" manifest:media-type="image/png"/>
  <manifest:file-entry manifest:full-path="Pictures/10000000000008D000000276A43CF5FC879EE173.png" manifest:media-type="image/png"/>
  <manifest:file-entry manifest:full-path="Pictures/10000000000002BD0000009CF34096DDA16D5865.png" manifest:media-type="image/png"/>
  <manifest:file-entry manifest:full-path="Pictures/10000000000000A900000101B002AC16B8C61913.png" manifest:media-type="image/png"/>
  <manifest:file-entry manifest:full-path="Pictures/10000000000005B8000000F7414113F0CDE33373.png" manifest:media-type="image/png"/>
  <manifest:file-entry manifest:full-path="Pictures/100000000000027300000022C8DAE96E51AA5B56.png" manifest:media-type="image/png"/>
  <manifest:file-entry manifest:full-path="Pictures/10000000000003280000003569F7F52A67533F59.png" manifest:media-type="image/png"/>
  <manifest:file-entry manifest:full-path="Pictures/100000000000030C0000001340D6E761C9F73DB6.png" manifest:media-type="image/png"/>
  <manifest:file-entry manifest:full-path="Pictures/10000000000005C60000008862AD6CD7E735566D.png" manifest:media-type="image/png"/>
  <manifest:file-entry manifest:full-path="Pictures/10000000000003F50000009B9C807E5D0A64F61D.png" manifest:media-type="image/png"/>
  <manifest:file-entry manifest:full-path="Pictures/1000000000000398000002136D87FD8BE2A7EC87.png" manifest:media-type="image/png"/>
  <manifest:file-entry manifest:full-path="Pictures/1000000000000601000000F9A4BEAB6460F15B6D.png" manifest:media-type="image/png"/>
  <manifest:file-entry manifest:full-path="Pictures/100000000000053B000000FA2ED811DB5FFE226D.png" manifest:media-type="image/png"/>
  <manifest:file-entry manifest:full-path="Pictures/1000000000000608000000FA55C560965C60BFE8.png" manifest:media-type="image/png"/>
  <manifest:file-entry manifest:full-path="Pictures/1000000000000A00000005A08D7E2D8FFAF26E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officeooo:rsid="00130610" officeooo:paragraph-rsid="00092a72"/>
    </style:style>
    <style:style style:name="P2" style:family="paragraph" style:parent-style-name="Text_20_body">
      <style:text-properties officeooo:paragraph-rsid="00092a72"/>
    </style:style>
    <style:style style:name="P3" style:family="paragraph" style:parent-style-name="Title">
      <style:text-properties officeooo:paragraph-rsid="00092a72"/>
    </style:style>
    <style:style style:name="P4" style:family="paragraph" style:parent-style-name="Text_20_body">
      <style:text-properties officeooo:rsid="00092a72" officeooo:paragraph-rsid="00092a72"/>
    </style:style>
    <style:style style:name="P5" style:family="paragraph" style:parent-style-name="Text_20_body">
      <style:text-properties officeooo:rsid="00099585" officeooo:paragraph-rsid="00099585"/>
    </style:style>
    <style:style style:name="P6" style:family="paragraph" style:parent-style-name="Text_20_body">
      <style:text-properties fo:font-style="italic" officeooo:rsid="00099585" officeooo:paragraph-rsid="00099585" style:font-style-asian="italic" style:font-style-complex="italic"/>
    </style:style>
    <style:style style:name="P7" style:family="paragraph" style:parent-style-name="Text_20_body">
      <style:text-properties fo:font-style="italic" officeooo:rsid="0009fa0b" officeooo:paragraph-rsid="0009fa0b" style:font-style-asian="italic" style:font-style-complex="italic"/>
    </style:style>
    <style:style style:name="P8" style:family="paragraph" style:parent-style-name="Text_20_body">
      <style:text-properties fo:font-style="normal" officeooo:rsid="00099585" officeooo:paragraph-rsid="00099585" style:font-style-asian="normal" style:font-style-complex="normal"/>
    </style:style>
    <style:style style:name="P9" style:family="paragraph" style:parent-style-name="Text_20_body">
      <style:text-properties fo:font-style="normal" officeooo:rsid="0009fa0b" officeooo:paragraph-rsid="0009fa0b" style:font-style-asian="normal" style:font-style-complex="normal"/>
    </style:style>
    <style:style style:name="P10" style:family="paragraph" style:parent-style-name="Text_20_body">
      <style:text-properties fo:font-style="normal" officeooo:rsid="000b5a51" officeooo:paragraph-rsid="000b5a51" style:font-style-asian="normal" style:font-style-complex="normal"/>
    </style:style>
    <style:style style:name="P11" style:family="paragraph" style:parent-style-name="Text_20_body">
      <style:text-properties fo:font-style="normal" officeooo:rsid="000d70ab" officeooo:paragraph-rsid="000d70ab" style:font-style-asian="normal" style:font-style-complex="normal"/>
    </style:style>
    <style:style style:name="P12" style:family="paragraph" style:parent-style-name="Text_20_body">
      <style:text-properties fo:font-style="normal" officeooo:rsid="0010294a" officeooo:paragraph-rsid="0010294a" style:font-style-asian="normal" style:font-style-complex="normal"/>
    </style:style>
    <style:style style:name="P13" style:family="paragraph" style:parent-style-name="Text_20_body">
      <style:text-properties fo:font-style="normal" style:text-underline-style="none" fo:font-weight="normal" officeooo:rsid="000b5a51" officeooo:paragraph-rsid="000b5a51"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rsid="000b5a51" officeooo:paragraph-rsid="000c7d2b"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00c7d2b" officeooo:paragraph-rsid="000c7d2b"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00d70ab" officeooo:paragraph-rsid="000d70ab"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00eaefe" officeooo:paragraph-rsid="000eaefe"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officeooo:rsid="000eaefe" officeooo:paragraph-rsid="0010294a" style:font-style-asian="normal" style:font-weight-asian="normal" style:font-style-complex="normal" style:font-weight-complex="normal"/>
    </style:style>
    <style:style style:name="P19" style:family="paragraph" style:parent-style-name="Text_20_body">
      <style:text-properties officeooo:rsid="000d70ab" officeooo:paragraph-rsid="000d70ab"/>
    </style:style>
    <style:style style:name="P20" style:family="paragraph" style:parent-style-name="Text_20_body">
      <style:text-properties style:font-name="Liberation Serif1" fo:font-style="normal" style:text-underline-style="none" fo:font-weight="normal" officeooo:rsid="000eaefe" officeooo:paragraph-rsid="000eaefe" style:font-name-asian="NSimSun" style:font-style-asian="normal" style:font-weight-asian="normal" style:font-name-complex="Arial1" style:font-style-complex="normal" style:font-weight-complex="normal"/>
    </style:style>
    <style:style style:name="P21" style:family="paragraph" style:parent-style-name="Text_20_body">
      <style:text-properties style:font-name="Liberation Serif1" officeooo:paragraph-rsid="000f8c59"/>
    </style:style>
    <style:style style:name="P22" style:family="paragraph" style:parent-style-name="Text_20_body">
      <style:text-properties style:font-name="Liberation Serif1"/>
    </style:style>
    <style:style style:name="P23" style:family="paragraph" style:parent-style-name="Text_20_body">
      <style:text-properties style:font-name="Liberation Serif1" fo:font-size="12pt" style:font-size-asian="12pt"/>
    </style:style>
    <style:style style:name="P24" style:family="paragraph" style:parent-style-name="Text_20_body">
      <style:text-properties style:font-name="Liberation Serif1" fo:font-size="12pt" officeooo:rsid="000eaefe" officeooo:paragraph-rsid="000eaefe" style:font-size-asian="12pt"/>
    </style:style>
    <style:style style:name="P25" style:family="paragraph" style:parent-style-name="Text_20_body">
      <style:text-properties officeooo:rsid="00102cd3" officeooo:paragraph-rsid="00102cd3"/>
    </style:style>
    <style:style style:name="P26" style:family="paragraph" style:parent-style-name="Text_20_body" style:list-style-name="L1">
      <style:text-properties officeooo:rsid="00099585" officeooo:paragraph-rsid="00099585"/>
    </style:style>
    <style:style style:name="P27" style:family="paragraph" style:parent-style-name="Text_20_body">
      <style:text-properties officeooo:rsid="00099585" officeooo:paragraph-rsid="00099585"/>
    </style:style>
    <style:style style:name="P28" style:family="paragraph" style:parent-style-name="Text_20_body" style:list-style-name="L1">
      <style:text-properties fo:font-style="italic" officeooo:rsid="00099585" officeooo:paragraph-rsid="00099585" style:font-style-asian="italic" style:font-style-complex="italic"/>
    </style:style>
    <style:style style:name="P29" style:family="paragraph" style:parent-style-name="Text_20_body" style:list-style-name="L2">
      <style:text-properties fo:font-style="italic" officeooo:rsid="00099585" officeooo:paragraph-rsid="00099585" style:font-style-asian="italic" style:font-style-complex="italic"/>
    </style:style>
    <style:style style:name="P30" style:family="paragraph" style:parent-style-name="Text_20_body" style:list-style-name="L2">
      <style:text-properties fo:font-style="italic" officeooo:rsid="000f8c59" officeooo:paragraph-rsid="000f8c59" style:font-style-asian="italic" style:font-style-complex="italic"/>
    </style:style>
    <style:style style:name="P31" style:family="paragraph" style:parent-style-name="Text_20_body" style:list-style-name="L4">
      <style:text-properties fo:font-style="italic" officeooo:rsid="0009fa0b" officeooo:paragraph-rsid="0009fa0b" style:font-style-asian="italic" style:font-style-complex="italic"/>
    </style:style>
    <style:style style:name="P32" style:family="paragraph" style:parent-style-name="Text_20_body" style:list-style-name="L5">
      <style:text-properties fo:font-style="italic" officeooo:rsid="0009fa0b" officeooo:paragraph-rsid="0009fa0b" style:font-style-asian="italic" style:font-style-complex="italic"/>
    </style:style>
    <style:style style:name="P33" style:family="paragraph" style:parent-style-name="Text_20_body" style:list-style-name="L5">
      <style:text-properties fo:font-style="italic" officeooo:rsid="0010294a" officeooo:paragraph-rsid="0010294a" style:font-style-asian="italic" style:font-style-complex="italic"/>
    </style:style>
    <style:style style:name="P34" style:family="paragraph" style:parent-style-name="Text_20_body" style:list-style-name="L3">
      <style:text-properties fo:font-style="normal" officeooo:rsid="0009fa0b" officeooo:paragraph-rsid="0009fa0b" style:font-style-asian="normal" style:font-style-complex="normal"/>
    </style:style>
    <style:style style:name="P35" style:family="paragraph" style:parent-style-name="Text_20_body" style:list-style-name="L4">
      <style:text-properties fo:font-style="normal" officeooo:rsid="0009fa0b" officeooo:paragraph-rsid="0009fa0b" style:font-style-asian="normal" style:font-style-complex="normal"/>
    </style:style>
    <style:style style:name="P36" style:family="paragraph" style:parent-style-name="Text_20_body" style:list-style-name="L6">
      <style:text-properties fo:font-style="normal" officeooo:rsid="0009fa0b" officeooo:paragraph-rsid="0009fa0b" style:font-style-asian="normal" style:font-style-complex="normal"/>
    </style:style>
    <style:style style:name="P37" style:family="paragraph" style:parent-style-name="Text_20_body" style:list-style-name="L7">
      <style:text-properties fo:font-style="normal" officeooo:rsid="0009fa0b" officeooo:paragraph-rsid="0009fa0b" style:font-style-asian="normal" style:font-style-complex="normal"/>
    </style:style>
    <style:style style:name="P38" style:family="paragraph" style:parent-style-name="Text_20_body" style:list-style-name="L7">
      <style:text-properties fo:font-style="normal" officeooo:rsid="000eaefe" officeooo:paragraph-rsid="000eaefe" style:font-style-asian="normal" style:font-style-complex="normal"/>
    </style:style>
    <style:style style:name="P39" style:family="paragraph" style:parent-style-name="Text_20_body" style:list-style-name="L7">
      <style:text-properties fo:font-style="normal" officeooo:rsid="000b5a51" officeooo:paragraph-rsid="000b5a51" style:font-style-asian="normal" style:font-style-complex="normal"/>
    </style:style>
    <style:style style:name="P40" style:family="paragraph" style:parent-style-name="Text_20_body" style:list-style-name="L8">
      <style:text-properties fo:font-style="normal" officeooo:rsid="000b5a51" officeooo:paragraph-rsid="000b5a51" style:font-style-asian="normal" style:font-style-complex="normal"/>
    </style:style>
    <style:style style:name="P41" style:family="paragraph" style:parent-style-name="Text_20_body">
      <style:text-properties fo:font-style="normal" officeooo:rsid="000d70ab" officeooo:paragraph-rsid="000d70ab" style:font-style-asian="normal" style:font-style-complex="normal"/>
    </style:style>
    <style:style style:name="P42" style:family="paragraph" style:parent-style-name="Text_20_body">
      <style:text-properties fo:font-style="normal" officeooo:rsid="00099585" officeooo:paragraph-rsid="000d70ab" style:font-style-asian="normal" style:font-style-complex="normal"/>
    </style:style>
    <style:style style:name="P43" style:family="paragraph" style:parent-style-name="Text_20_body">
      <style:text-properties fo:font-style="normal" officeooo:rsid="00099585" officeooo:paragraph-rsid="00099585" style:font-style-asian="normal" style:font-style-complex="normal"/>
    </style:style>
    <style:style style:name="P44" style:family="paragraph" style:parent-style-name="Text_20_body" style:list-style-name="L9">
      <style:text-properties fo:font-style="normal" style:text-underline-style="none" fo:font-weight="normal" officeooo:rsid="000c7d2b" officeooo:paragraph-rsid="000c7d2b" style:font-style-asian="normal" style:font-weight-asian="normal" style:font-style-complex="normal" style:font-weight-complex="normal"/>
    </style:style>
    <style:style style:name="P45" style:family="paragraph" style:parent-style-name="Text_20_body" style:list-style-name="L10">
      <style:text-properties fo:font-style="normal" style:text-underline-style="none" fo:font-weight="normal" officeooo:rsid="000c7d2b" officeooo:paragraph-rsid="000c7d2b" style:font-style-asian="normal" style:font-weight-asian="normal" style:font-style-complex="normal" style:font-weight-complex="normal"/>
    </style:style>
    <style:style style:name="P46" style:family="paragraph" style:parent-style-name="Text_20_body" style:list-style-name="L11">
      <style:text-properties fo:font-style="normal" style:text-underline-style="none" fo:font-weight="normal" officeooo:rsid="000c7d2b" officeooo:paragraph-rsid="000c7d2b" style:font-style-asian="normal" style:font-weight-asian="normal" style:font-style-complex="normal" style:font-weight-complex="normal"/>
    </style:style>
    <style:style style:name="P47" style:family="paragraph" style:parent-style-name="Text_20_body" style:list-style-name="L12">
      <style:text-properties fo:font-style="normal" style:text-underline-style="none" fo:font-weight="normal" officeooo:rsid="000d70ab" officeooo:paragraph-rsid="000d70ab" style:font-style-asian="normal" style:font-weight-asian="normal" style:font-style-complex="normal" style:font-weight-complex="normal"/>
    </style:style>
    <style:style style:name="P48" style:family="paragraph" style:parent-style-name="Text_20_body" style:list-style-name="L13">
      <style:text-properties fo:font-style="normal" style:text-underline-style="none" fo:font-weight="normal" officeooo:rsid="000eaefe" officeooo:paragraph-rsid="000eaefe" style:font-style-asian="normal" style:font-weight-asian="normal" style:font-style-complex="normal" style:font-weight-complex="normal"/>
    </style:style>
    <style:style style:name="P49" style:family="paragraph" style:parent-style-name="Text_20_body" style:list-style-name="L14">
      <style:text-properties fo:font-style="normal" style:text-underline-style="none" fo:font-weight="normal" officeooo:rsid="000eaefe" officeooo:paragraph-rsid="000eaefe" style:font-style-asian="normal" style:font-weight-asian="normal" style:font-style-complex="normal" style:font-weight-complex="normal"/>
    </style:style>
    <style:style style:name="P50" style:family="paragraph" style:parent-style-name="Text_20_body" style:list-style-name="L15">
      <style:text-properties fo:font-style="normal" style:text-underline-style="none" fo:font-weight="normal" officeooo:rsid="000eaefe" officeooo:paragraph-rsid="000eaefe" style:font-style-asian="normal" style:font-weight-asian="normal" style:font-style-complex="normal" style:font-weight-complex="normal"/>
    </style:style>
    <style:style style:name="P51" style:family="paragraph" style:parent-style-name="Text_20_body" style:list-style-name="L15">
      <style:text-properties fo:font-style="normal" style:text-underline-style="none" fo:font-weight="normal" officeooo:rsid="000eaefe" officeooo:paragraph-rsid="0010294a" style:font-style-asian="normal" style:font-weight-asian="normal" style:font-style-complex="normal" style:font-weight-complex="normal"/>
    </style:style>
    <style:style style:name="P52" style:family="paragraph" style:parent-style-name="Text_20_body" style:list-style-name="L16">
      <style:text-properties fo:font-style="normal" style:text-underline-style="none" fo:font-weight="normal" officeooo:rsid="000eaefe" officeooo:paragraph-rsid="000eaefe" style:font-style-asian="normal" style:font-weight-asian="normal" style:font-style-complex="normal" style:font-weight-complex="normal"/>
    </style:style>
    <style:style style:name="P53" style:family="paragraph" style:parent-style-name="Text_20_body" style:list-style-name="L15">
      <style:text-properties fo:font-style="normal" style:text-underline-style="none" fo:font-weight="normal" officeooo:rsid="0010294a" officeooo:paragraph-rsid="0010294a" style:font-style-asian="normal" style:font-weight-asian="normal" style:font-style-complex="normal" style:font-weight-complex="normal"/>
    </style:style>
    <style:style style:name="P54" style:family="paragraph" style:parent-style-name="Text_20_body" style:list-style-name="L11">
      <style:text-properties fo:font-style="normal" style:text-underline-style="none" fo:font-weight="normal" officeooo:rsid="00118913" officeooo:paragraph-rsid="00118913" style:font-style-asian="normal" style:font-weight-asian="normal" style:font-style-complex="normal" style:font-weight-complex="normal"/>
    </style:style>
    <style:style style:name="P55" style:family="paragraph" style:parent-style-name="Text_20_body">
      <style:text-properties style:font-name="Liberation Serif1" fo:font-style="normal" style:text-underline-style="none" fo:font-weight="normal" officeooo:rsid="000eaefe" officeooo:paragraph-rsid="000eaefe" style:font-name-asian="NSimSun" style:font-style-asian="normal" style:font-weight-asian="normal" style:font-name-complex="Arial1" style:font-style-complex="normal" style:font-weight-complex="normal"/>
    </style:style>
    <style:style style:name="P56" style:family="paragraph" style:parent-style-name="Text_20_body" style:list-style-name="L15">
      <style:text-properties style:font-name="Liberation Serif1" fo:font-style="normal" style:text-underline-style="none" fo:font-weight="normal" officeooo:rsid="000eaefe" officeooo:paragraph-rsid="000eaefe" style:font-name-asian="NSimSun" style:font-style-asian="normal" style:font-weight-asian="normal" style:font-name-complex="Arial1" style:font-style-complex="normal" style:font-weight-complex="normal"/>
    </style:style>
    <style:style style:name="P57" style:family="paragraph" style:parent-style-name="Text_20_body" style:list-style-name="L16">
      <style:text-properties style:font-name="Liberation Serif1" fo:font-style="normal" style:text-underline-style="none" fo:font-weight="normal" officeooo:rsid="000eaefe" officeooo:paragraph-rsid="000eaefe" style:font-name-asian="NSimSun" style:font-style-asian="normal" style:font-weight-asian="normal" style:font-name-complex="Arial1" style:font-style-complex="normal" style:font-weight-complex="normal"/>
    </style:style>
    <style:style style:name="P58" style:family="paragraph" style:parent-style-name="Text_20_body" style:list-style-name="L17">
      <style:text-properties style:font-name="Liberation Serif1" officeooo:paragraph-rsid="000f8c59"/>
    </style:style>
    <style:style style:name="P59" style:family="paragraph" style:parent-style-name="Text_20_body">
      <style:text-properties officeooo:rsid="00102cd3" officeooo:paragraph-rsid="00102cd3"/>
    </style:style>
    <style:style style:name="P60" style:family="paragraph" style:parent-style-name="Text_20_body">
      <style:text-properties officeooo:rsid="00118913" officeooo:paragraph-rsid="00118913"/>
    </style:style>
    <style:style style:name="P61" style:family="paragraph" style:parent-style-name="Text_20_body" style:list-style-name="L18">
      <style:text-properties officeooo:rsid="00118913" officeooo:paragraph-rsid="00118913"/>
    </style:style>
    <style:style style:name="P62" style:family="paragraph" style:parent-style-name="Text_20_body" style:list-style-name="L18">
      <style:text-properties officeooo:paragraph-rsid="00118913"/>
    </style:style>
    <style:style style:name="T1" style:family="text">
      <style:text-properties officeooo:rsid="00092a72"/>
    </style:style>
    <style:style style:name="T2" style:family="text">
      <style:text-properties officeooo:rsid="00099585"/>
    </style:style>
    <style:style style:name="T3" style:family="text">
      <style:text-properties fo:font-style="italic" style:font-style-asian="italic" style:font-style-complex="italic"/>
    </style:style>
    <style:style style:name="T4" style:family="text">
      <style:text-properties fo:font-style="italic" officeooo:rsid="00099585" style:font-style-asian="italic" style:font-style-complex="italic"/>
    </style:style>
    <style:style style:name="T5" style:family="text">
      <style:text-properties fo:font-style="italic" officeooo:rsid="000b5a51" style:font-style-asian="italic" style:font-style-complex="italic"/>
    </style:style>
    <style:style style:name="T6" style:family="text">
      <style:text-properties fo:font-style="italic" officeooo:rsid="000c7d2b" style:font-style-asian="italic" style:font-style-complex="italic"/>
    </style:style>
    <style:style style:name="T7" style:family="text">
      <style:text-properties fo:font-style="italic" officeooo:rsid="000d70ab" style:font-style-asian="italic" style:font-style-complex="italic"/>
    </style:style>
    <style:style style:name="T8" style:family="text">
      <style:text-properties fo:font-style="italic" officeooo:rsid="0009fa0b" style:font-style-asian="italic" style:font-style-complex="italic"/>
    </style:style>
    <style:style style:name="T9" style:family="text">
      <style:text-properties fo:font-style="italic" officeooo:rsid="0010294a" style:font-style-asian="italic" style:font-style-complex="italic"/>
    </style:style>
    <style:style style:name="T10" style:family="text">
      <style:text-properties fo:font-style="italic" officeooo:rsid="00118913" style:font-style-asian="italic" style:font-style-complex="italic"/>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font-name-asian="NSimSun" style:font-style-asian="italic" style:font-name-complex="Arial1" style:font-style-complex="italic"/>
    </style:style>
    <style:style style:name="T13" style:family="text">
      <style:text-properties fo:font-style="normal" style:font-style-asian="normal" style:font-style-complex="normal"/>
    </style:style>
    <style:style style:name="T14" style:family="text">
      <style:text-properties fo:font-style="normal" officeooo:rsid="0009fa0b" style:font-style-asian="normal" style:font-style-complex="normal"/>
    </style:style>
    <style:style style:name="T15" style:family="text">
      <style:text-properties fo:font-style="normal" officeooo:rsid="000d70ab" style:font-style-asian="normal" style:font-style-complex="normal"/>
    </style:style>
    <style:style style:name="T16" style:family="text">
      <style:text-properties fo:font-style="normal" officeooo:rsid="000f8c59" style:font-style-asian="normal" style:font-style-complex="normal"/>
    </style:style>
    <style:style style:name="T17" style:family="text">
      <style:text-properties fo:font-style="normal" officeooo:rsid="0010294a" style:font-style-asian="normal" style:font-style-complex="normal"/>
    </style:style>
    <style:style style:name="T18" style:family="text">
      <style:text-properties fo:font-style="normal" officeooo:rsid="00118913" style:font-style-asian="normal" style:font-style-complex="normal"/>
    </style:style>
    <style:style style:name="T19" style:family="text">
      <style:text-properties officeooo:rsid="000b5a51"/>
    </style:style>
    <style:style style:name="T20" style:family="text">
      <style:text-properties style:text-underline-style="none" fo:font-weight="normal" style:font-weight-asian="normal" style:font-weight-complex="normal"/>
    </style:style>
    <style:style style:name="T21" style:family="text">
      <style:text-properties officeooo:rsid="000c7d2b"/>
    </style:style>
    <style:style style:name="T22" style:family="text">
      <style:text-properties officeooo:rsid="000d70ab"/>
    </style:style>
    <style:style style:name="T23" style:family="text">
      <style:text-properties officeooo:rsid="000eaefe"/>
    </style:style>
    <style:style style:name="T24" style:family="text">
      <style:text-properties style:font-name="Liberation Serif" style:font-name-asian="Liberation Serif" style:font-name-complex="Liberation Serif"/>
    </style:style>
    <style:style style:name="T25" style:family="text">
      <style:text-properties style:font-name="Liberation Serif1" style:font-name-asian="NSimSun" style:font-name-complex="Arial1"/>
    </style:style>
    <style:style style:name="T26" style:family="text">
      <style:text-properties style:font-name="Liberation Serif1" officeooo:rsid="000f8c59" style:font-name-asian="NSimSun" style:font-name-complex="Arial1"/>
    </style:style>
    <style:style style:name="T27" style:family="text">
      <style:text-properties style:font-name="Liberation Serif1" officeooo:rsid="0010294a" style:font-name-asian="NSimSun" style:font-name-complex="Arial1"/>
    </style:style>
    <style:style style:name="T28" style:family="text">
      <style:text-properties style:font-name="Liberation Serif1" officeooo:rsid="00118913" style:font-name-asian="NSimSun" style:font-name-complex="Arial1"/>
    </style:style>
    <style:style style:name="T29" style:family="text">
      <style:text-properties style:font-name="Liberation Serif1" fo:font-style="italic" style:font-name-asian="NSimSun" style:font-style-asian="italic" style:font-name-complex="Arial1" style:font-style-complex="italic"/>
    </style:style>
    <style:style style:name="T30" style:family="text">
      <style:text-properties style:font-name="Liberation Serif1" fo:font-style="italic" officeooo:rsid="0010294a" style:font-name-asian="NSimSun" style:font-style-asian="italic" style:font-name-complex="Arial1" style:font-style-complex="italic"/>
    </style:style>
    <style:style style:name="T31" style:family="text">
      <style:text-properties style:font-name="Liberation Serif1" fo:font-style="italic" officeooo:rsid="00118913" style:font-name-asian="NSimSun" style:font-style-asian="italic" style:font-name-complex="Arial1" style:font-style-complex="italic"/>
    </style:style>
    <style:style style:name="T32" style:family="text">
      <style:text-properties officeooo:rsid="000f8c59"/>
    </style:style>
    <style:style style:name="T33" style:family="text">
      <style:text-properties fo:font-size="12pt" style:font-size-asian="12pt"/>
    </style:style>
    <style:style style:name="T34" style:family="text">
      <style:text-properties fo:font-size="12pt" officeooo:rsid="000f8c59" style:font-size-asian="12pt"/>
    </style:style>
    <style:style style:name="T35" style:family="text">
      <style:text-properties fo:font-size="12pt" officeooo:rsid="00102cd3" style:font-size-asian="12pt"/>
    </style:style>
    <style:style style:name="T36" style:family="text">
      <style:text-properties fo:font-size="12pt" fo:font-style="italic" style:font-size-asian="12pt" style:font-style-asian="italic"/>
    </style:style>
    <style:style style:name="T37" style:family="text">
      <style:text-properties fo:font-size="12pt" fo:font-style="italic" officeooo:rsid="000f8c59" style:font-size-asian="12pt" style:font-style-asian="italic" style:font-style-complex="italic"/>
    </style:style>
    <style:style style:name="T38" style:family="text">
      <style:text-properties fo:font-size="12pt" fo:font-style="italic" officeooo:rsid="000f8c59" style:font-size-asian="12pt" style:font-style-asian="italic"/>
    </style:style>
    <style:style style:name="T39" style:family="text">
      <style:text-properties fo:font-size="12pt" fo:font-style="normal" style:font-size-asian="12pt" style:font-style-asian="normal" style:font-style-complex="normal"/>
    </style:style>
    <style:style style:name="T40" style:family="text">
      <style:text-properties fo:font-size="12pt" fo:font-style="normal" officeooo:rsid="000f8c59" style:font-size-asian="12pt" style:font-style-asian="normal" style:font-style-complex="normal"/>
    </style:style>
    <style:style style:name="T41" style:family="text">
      <style:text-properties fo:font-size="12pt" fo:font-style="normal" officeooo:rsid="00102cd3" style:font-size-asian="12pt" style:font-style-asian="normal" style:font-style-complex="normal"/>
    </style:style>
    <style:style style:name="T42" style:family="text">
      <style:text-properties fo:font-size="12pt" fo:font-style="normal" fo:font-weight="bold" officeooo:rsid="000f8c59" style:font-size-asian="12pt" style:font-style-asian="normal" style:font-weight-asian="bold" style:font-style-complex="normal"/>
    </style:style>
    <style:style style:name="T43" style:family="text">
      <style:text-properties fo:font-size="12pt" fo:font-style="normal" fo:font-weight="normal" officeooo:rsid="000f8c59" style:font-size-asian="12pt" style:font-style-asian="normal" style:font-weight-asian="normal" style:font-style-complex="normal" style:font-weight-complex="normal"/>
    </style:style>
    <style:style style:name="T44" style:family="text">
      <style:text-properties fo:font-size="12pt" fo:font-weight="bold" style:font-size-asian="12pt" style:font-weight-asian="bold"/>
    </style:style>
    <style:style style:name="T45" style:family="text">
      <style:text-properties fo:font-size="12pt" fo:font-weight="bold" officeooo:rsid="000f8c59" style:font-size-asian="12pt" style:font-weight-asian="bold"/>
    </style:style>
    <style:style style:name="T46" style:family="text">
      <style:text-properties style:font-name-asian="NSimSun" style:font-name-complex="Arial1"/>
    </style:style>
    <style:style style:name="T47" style:family="text">
      <style:text-properties officeooo:rsid="0010294a"/>
    </style:style>
    <style:style style:name="T48" style:family="text">
      <style:text-properties officeooo:rsid="0009fa0b"/>
    </style:style>
    <style:style style:name="T49" style:family="text">
      <style:text-properties officeooo:rsid="00102cd3"/>
    </style:style>
    <style:style style:name="T50" style:family="text">
      <style:text-properties officeooo:rsid="00118913"/>
    </style:style>
    <style:style style:name="T51" style:family="text">
      <style:text-properties style:text-position="super 58%"/>
    </style:style>
    <style:style style:name="T52" style:family="text">
      <style:text-properties style:text-position="super 58%" style:font-name="Liberation Serif1" style:font-name-asian="NSimSun" style:font-name-complex="Arial1"/>
    </style:style>
    <style:style style:name="T53" style:family="text">
      <style:text-properties style:text-position="0% 1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798cm, 20.81cm, 9.97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6.26cm, 0cm, 0.093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left" style:horizontal-rel="paragraph" style:mirror="none" fo:clip="rect(0cm, 0cm, 14.05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vire SCHOTT GUILMAULT</text:p>
      <text:p text:style-name="P3">Formation FPGA</text:p>
      <text:p text:style-name="P3">TP<text:span text:style-name="T1">3</text:span> – Machine à états (FSM)</text:p>
      <text:p text:style-name="P2"/>
      <text:p text:style-name="P4"/>
      <text:p text:style-name="Text_20_body">1) <text:span text:style-name="T2">En reprenant le fichier VHDL du TP2, je crée le fichier </text:span><text:span text:style-name="T4">counter_unit.vhd</text:span><text:span text:style-name="T2">.</text:span></text:p>
      <text:p text:style-name="P5">Le code du fichier définit une entité simplifiée par rapport à celle du TP2.</text:p>
      <text:p text:style-name="P5">Elle possède toujours 2 entrées (<text:span text:style-name="T3">clk </text:span><text:span text:style-name="T13">et</text:span><text:span text:style-name="T3"> resetn</text:span><text:span text:style-name="T13">), mais plus qu’une seule sortie, </text:span><text:span text:style-name="T3">end_counter</text:span><text:span text:style-name="T13">. La sortie </text:span><text:span text:style-name="T3">led </text:span><text:span text:style-name="T13">qui existait dans le TP précédent est supprimée, ainsi que toute la logique l’accompagnant (détection du front montant sur le signal interne </text:span><text:span text:style-name="T3">r_cible,</text:span><text:span text:style-name="T13"> stockage et mise-à-jour du signal </text:span><text:span text:style-name="T3">led_in</text:span><text:span text:style-name="T13">).</text:span></text:p>
      <text:p text:style-name="P5"><text:span text:style-name="T13">La variable </text:span><text:span text:style-name="T3">cible</text:span><text:span text:style-name="T13"> (ie le nombre de coups d’horloge entre deux pics de </text:span><text:span text:style-name="T3">end_counter</text:span><text:span text:style-name="T13">) était une constante lors du TP2. Il s’agit maintenant d’un paramètre </text:span><text:span text:style-name="T3">generic() </text:span><text:span text:style-name="T14">(</text:span><text:span text:style-name="T15">de type </text:span><text:span text:style-name="T14">positive, </text:span><text:span text:style-name="T15">maximum</text:span><text:span text:style-name="T14"> 31 bits)</text:span><text:span text:style-name="T13">, que l’on peut redéfinir pour chaque instanciation de </text:span><text:span text:style-name="T3">Counter_unit</text:span><text:span text:style-name="T13">.</text:span></text:p>
      <text:p text:style-name="P19"><text:span text:style-name="T13">Pour adapter la taille du signal </text:span><text:span text:style-name="T3">Data, </text:span><text:span text:style-name="T13">on rajoute une ligne pour calculer la taille du vecteur nécessaire pour stocker l’information du compteur </text:span><text:span text:style-name="T18">(les fonctions ceil et log2 viennent de la bibliothèque ieee.math_real</text:span><text:span text:style-name="T13"> :</text:span></text:p>
      <text:p text:style-name="P11"><draw:frame draw:style-name="fr1" draw:name="Image5" text:anchor-type="char" svg:x="0cm" svg:y="0.004cm" svg:width="12.885cm" svg:height="0.9cm" draw:z-index="24"><draw:image xlink:href="Pictures/10000000000001E70000002276956DB338947397.png" xlink:type="simple" xlink:show="embed" xlink:actuate="onLoad" draw:mime-type="image/png"/></draw:frame></text:p>
      <text:p text:style-name="P11">On adapte aussi la réinitialisation du signal <text:span text:style-name="T3">Data</text:span>, pour qu’elle ne soit plus assurée sur un signal fixe, mais en réinitialisant à ‘1’ le dernier bit et à ‘0’ les autres :</text:p>
      <text:p text:style-name="P11"><draw:frame draw:style-name="fr13" draw:name="Image6" text:anchor-type="char" svg:width="8.996cm" svg:height="1.482cm" draw:z-index="0"><draw:image xlink:href="Pictures/100000000000015400000038C4973926BAD80354.png" xlink:type="simple" xlink:show="embed" xlink:actuate="onLoad" draw:mime-type="image/png"/></draw:frame></text:p>
      <text:p text:style-name="P42"/>
      <text:p text:style-name="P8"/>
      <text:p text:style-name="P8"/>
      <text:p text:style-name="P5"><text:span text:style-name="T13">2) Voici le schéma RTL de notre compteur du signal </text:span><text:span text:style-name="T3">end_counter </text:span><text:span text:style-name="T13">:</text:span></text:p>
      <text:p text:style-name="P5"><draw:frame draw:style-name="fr5" draw:name="Image1" text:anchor-type="char" svg:width="17cm" svg:height="9.169cm" draw:z-index="18"><draw:image xlink:href="Pictures/100000010000041000000231352C4ED0B1AE90DD.png" xlink:type="simple" xlink:show="embed" xlink:actuate="onLoad" draw:mime-type="image/png"/></draw:frame><text:soft-page-break/><text:span text:style-name="T13"/></text:p>
      <text:p text:style-name="P5"><text:span text:style-name="T13">Ce schéma comporte trois entrées :</text:span></text:p>
      <text:list text:style-name="L1">
        <text:list-item>
          <text:p text:style-name="P26"><text:span text:style-name="T3">clk</text:span><text:span text:style-name="T13">, le signal d’horloge (sur 1 bit) ;</text:span></text:p>
        </text:list-item>
        <text:list-item>
          <text:p text:style-name="P26"><text:span text:style-name="T3">resetn</text:span><text:span text:style-name="T13">, </text:span><text:span text:style-name="T16">le</text:span><text:span text:style-name="T13"> signal de reset </text:span><text:span text:style-name="T16">haut global</text:span><text:span text:style-name="T3"> </text:span><text:span text:style-name="T13">(sur 1 bit)</text:span><text:span text:style-name="T3"> ;</text:span></text:p>
        </text:list-item>
        <text:list-item>
          <text:p text:style-name="P28">res<text:span text:style-name="T32">tart</text:span><text:span text:style-name="T13">, un signal </text:span><text:span text:style-name="T16">qui permet de réinitialiser</text:span><text:span text:style-name="T13"> le registre de notre compteur de cycles (sur 1 bit).</text:span></text:p>
        </text:list-item>
      </text:list>
      <text:p text:style-name="P6"><text:span text:style-name="T13">Il comporte une sortie : </text:span>n_cycle <text:span text:style-name="T13">(sur un nombre variable </text:span>n <text:span text:style-name="T13">de bits, </text:span><text:span text:style-name="T18">paramètre </text:span><text:span text:style-name="T50">generic()</text:span><text:span text:style-name="T18"> défini à chaque instanciation</text:span><text:span text:style-name="T13">) qui correspond au nombre de pics en sortie d’une instance </text:span>Counter_unit<text:span text:style-name="T13"> depuis le dernier res</text:span><text:span text:style-name="T16">tart/resetn</text:span><text:span text:style-name="T13">.</text:span></text:p>
      <text:p text:style-name="P8">L’architecture décrite par le schéma comprend :</text:p>
      <text:list text:style-name="L2">
        <text:list-item>
          <text:p text:style-name="P29"><text:span text:style-name="T13">Une instance de </text:span>Counter_unit<text:span text:style-name="T13">, pilotée par l’horloge </text:span>clk<text:span text:style-name="T13"> et le signal </text:span>resetn.</text:p>
        </text:list-item>
        <text:list-item>
          <text:p text:style-name="P29"><text:span text:style-name="T13">Un registre enregistrant les</text:span> n<text:span text:style-name="T13"> bits du signal </text:span>n_cycle<text:span text:style-name="T13">, piloté par l’horloge </text:span>clk<text:span text:style-name="T13"> et le signal </text:span>resetn.</text:p>
        </text:list-item>
        <text:list-item>
          <text:p text:style-name="P29"><text:span text:style-name="T13">La logique de mise à jour en entrée registre, qui garde sa valeur actuelle lorsque la sortie </text:span>end_counter<text:span text:style-name="T13"> de l’instance </text:span>Counter_unit<text:span text:style-name="T13"> vaut ‘0’, et s’incrémente de 1 lorsque la sortie </text:span>end_counter<text:span text:style-name="T13"> de l’instance </text:span>Counter_unit<text:span text:style-name="T13"> vaut ‘1’.</text:span></text:p>
        </text:list-item>
        <text:list-item>
          <text:p text:style-name="P30"><text:span text:style-name="T13">La logique de réinitialisation </text:span><text:span text:style-name="T18">synchrone </text:span><text:span text:style-name="T13">du compteur, qui se remet à 0 lorsque le signal </text:span>restart<text:span text:style-name="T13"> est activé.</text:span></text:p>
        </text:list-item>
      </text:list>
      <text:p text:style-name="P8"/>
      <text:p text:style-name="P7"><text:span text:style-name="T13">3) L’architecture décrite dans le schéma RTL précédent est retranscrite en code VHDL, définissant le module</text:span> Counter_cycle<text:span text:style-name="T13"> à l’intérieur du nouveau</text:span> <text:span text:style-name="T13">fichier VHDL </text:span>counter_cycle.vhd.</text:p>
      <text:p text:style-name="P9">En plus des entrées et sorties visibles sur le schéma, on définit pour notre module deux paramètres <text:span text:style-name="T3">generic() </text:span>:</text:p>
      <text:list text:style-name="L3">
        <text:list-item>
          <text:p text:style-name="P34"><text:soft-page-break/>Un paramètre <text:span text:style-name="T3">cible</text:span> (stocké comme positive, sur 31 bits), qui est utilisé pour la définition du paramètre éponyme dans l’instance du <text:span text:style-name="T3">Counter_unit</text:span> interne, et qui va donc définir la durée en nombre de périodes d’horloge des cycles qu’on va compter.</text:p>
        </text:list-item>
        <text:list-item>
          <text:p text:style-name="P34">Un paramètre <text:span text:style-name="T3">size</text:span> (stocké comme un positive entre 1 et 32, donc sur 5 bits) qui définit la taille en nombre de bits du signal compteur <text:span text:style-name="T3">n_cycle.</text:span></text:p>
        </text:list-item>
      </text:list>
      <text:p text:style-name="P9"/>
      <text:p text:style-name="P7"><text:span text:style-name="T13">4) On établit un testbench du module </text:span>Counter_cycle<text:span text:style-name="T13"> à l’intérieur du fichier de simulation </text:span>tb_counter_cycle.vhd<text:span text:style-name="T13">.</text:span></text:p>
      <text:p text:style-name="P9">Pour rendre notre simulation rapide, on va repartir des paramètres utilisés pour le TP2 :</text:p>
      <text:list text:style-name="L4">
        <text:list-item>
          <text:p text:style-name="P35">Une horloge de fréquence 100 MHz, soit une période de 10 ns, avec un signal carré (demi-période 5 ns)</text:p>
        </text:list-item>
        <text:list-item>
          <text:p text:style-name="P31"><text:span text:style-name="T13">Une </text:span>cible<text:span text:style-name="T13"> du compteur de 200000, ce qui correspond à des cycles de 2 ms</text:span></text:p>
        </text:list-item>
      </text:list>
      <text:p text:style-name="P9">Pendant notre simulation, on va observer principalement :</text:p>
      <text:list text:style-name="L5">
        <text:list-item>
          <text:p text:style-name="P32"><text:span text:style-name="T13">Le signal de sortie </text:span>n_cycle<text:span text:style-name="T13">, notre compteur de cible.</text:span></text:p>
        </text:list-item>
        <text:list-item>
          <text:p text:style-name="P32"><text:span text:style-name="T13">Le signal interne </text:span>end_counter<text:span text:style-name="T13">, qui forme un pic à chaque fois que le </text:span>Counter_unit<text:span text:style-name="T13"> termine un cycle.</text:span></text:p>
        </text:list-item>
        <text:list-item>
          <text:p text:style-name="P32"><text:span text:style-name="T13">Le signal d’entrée </text:span>resetn<text:span text:style-name="T13">, dont la mise en état haut doit réinitialiser à 0 la valeur de n_cycle, et dont la remise à l’état bas fait redémarrer le cycle de </text:span>Counter_unit<text:span text:style-name="T13"> et donc également notre compteur de cycle</text:span><text:span text:style-name="T18">s</text:span><text:span text:style-name="T13">.</text:span></text:p>
        </text:list-item>
        <text:list-item>
          <text:p text:style-name="P33"><text:span text:style-name="T13">Le signal d’entrée </text:span>restart, <text:span text:style-name="T13">qui tant qu’il est haut réinitialise et bloque à 0 notre compteur de cycle</text:span><text:span text:style-name="T18">s</text:span><text:span text:style-name="T13"> sans arrêter le </text:span>Counter_unit.</text:p>
        </text:list-item>
      </text:list>
      <text:p text:style-name="P7"><text:span text:style-name="T13">Voici le chronogramme observé pour </text:span><text:span text:style-name="T17">20 </text:span><text:span text:style-name="T13">ms de simulation, avec une activation du signal </text:span>resetn<text:span text:style-name="T13"> entre t=7 ms et t=8 ms, </text:span><text:span text:style-name="T17">et une activation de </text:span><text:span text:style-name="T47">restart </text:span><text:span text:style-name="T17">entre t=13 ms et t=15 ms</text:span><text:span text:style-name="T13"> :</text:span></text:p>
      <text:p text:style-name="P7"><draw:frame draw:style-name="fr3" draw:name="Image2" text:anchor-type="char" svg:width="20.001cm" svg:height="4.538cm" draw:z-index="5"><draw:image xlink:href="Pictures/10000000000005860000014159CD6D2BC93283A3.png" xlink:type="simple" xlink:show="embed" xlink:actuate="onLoad" draw:mime-type="image/png"/></draw:frame><text:span text:style-name="T13"/></text:p>
      <text:p text:style-name="P7"><text:span text:style-name="T13">Pendant les 7 premières millisecondes de fonctionnement normal, on observe bien un pic de </text:span>end_counter<text:span text:style-name="T13"> toutes les 2 millisecondes, suivi à chaque fois d’une incrémentation de </text:span>n_cycle<text:span text:style-name="T13">.</text:span></text:p>
      <text:p text:style-name="P9">À t=7 ms, le signal <text:span text:style-name="T3">resetn</text:span> est activé. On observe comme attendu qu’à ce moment, le signal <text:span text:style-name="T3">n_cycle</text:span> se réinitialise à 0.</text:p>
      <text:p text:style-name="P9">À t=8 ms, le signal <text:span text:style-name="T3">resetn</text:span> est désactivé. À partir de là, le fonctionnement normal recommence, <text:span text:style-name="T3">end_counter</text:span> fait un pic toutes les 2 millisecondes, et <text:span text:style-name="T3">n_cycle</text:span> s’incrémente bien après chaque pic.</text:p>
      <text:p text:style-name="P12"><text:soft-page-break/>À t=13 ms, le signal <text:span text:style-name="T3">restart</text:span> est activé. <text:span text:style-name="T48">On observe comme attendu qu’</text:span>au coup d’horloge suivant,<text:span text:style-name="T48"> le signal </text:span><text:span text:style-name="T8">n_cycle</text:span><text:span text:style-name="T48"> se réinitialise à 0. </text:span>On remarque aussi que l’instance <text:span text:style-name="T3">Counter_unit</text:span> continue bien de fonctionner alors que <text:span text:style-name="T3">restart</text:span> est activé, avec un nouveau pic haut de <text:span text:style-name="T3">end_counter</text:span> à t=14 ms qui ne déclenche pas d’incrémentation du compteur de cycle<text:span text:style-name="T50">s</text:span>.</text:p>
      <text:p text:style-name="P12">À t=15 ms, le signal <text:span text:style-name="T3">restart </text:span>est désactivé. À partir de là, le compteur de cycle<text:span text:style-name="T50">s</text:span> est réactivé, et recommencera à s’incrémenter avec le pic haut de <text:span text:style-name="T3">end_counter</text:span> à t=16 ms.</text:p>
      <text:p text:style-name="P12"/>
      <text:p text:style-name="P20">On a également implémenté des tests automatiques dans notre testbench, pour vérifier que le comportement du compteur de cycles suit bien ce que nous attendons. <text:span text:style-name="T47">À noter, notre testbench a été compilé avec la version VHDL 2008, afin de pouvoir effectuer un test sur le signal interne </text:span><text:span text:style-name="T9">end_counter</text:span><text:span text:style-name="T47">.</text:span></text:p>
      <text:p text:style-name="P20">Tous ces tests ont été vérifiés :</text:p>
      <text:p text:style-name="P17"><draw:frame draw:style-name="fr12" draw:name="Image11" text:anchor-type="char" svg:width="6.57cm" svg:height="9.8cm" draw:z-index="6"><draw:image xlink:href="Pictures/100000000000012B000001BED33FA9FE54F64459.png" xlink:type="simple" xlink:show="embed" xlink:actuate="onLoad" draw:mime-type="image/png"/></draw:frame><text:span text:style-name="T25"/></text:p>
      <text:p text:style-name="P9">5) Notre machine à états (FSM) comportera quatre états :</text:p>
      <text:list text:style-name="L6">
        <text:list-item>
          <text:p text:style-name="P36">L’état initial <text:span text:style-name="T3">init</text:span>, également retrouvé en cas de reset, et dans lequel les 3 LEDs sont activées.</text:p>
        </text:list-item>
        <text:list-item>
          <text:p text:style-name="P36">L’état <text:span text:style-name="T3">red</text:span>, dans lequel seule la LED rouge est activée.</text:p>
        </text:list-item>
        <text:list-item>
          <text:p text:style-name="P36">L’état <text:span text:style-name="T3">green</text:span>, dans lequel seule la LED verte est activée.</text:p>
        </text:list-item>
        <text:list-item>
          <text:p text:style-name="P36">L’état <text:span text:style-name="T3">blue</text:span>, dans lequel seule la LED bleue est activée.</text:p>
        </text:list-item>
      </text:list>
      <text:p text:style-name="P9"><text:span text:style-name="T23">3</text:span> signaux viennent piloter notre FSM :</text:p>
      <text:list text:style-name="L7">
        <text:list-item>
          <text:p text:style-name="P38">Un signal d’horloge pour synchroniser nos changements d’états (<text:span text:style-name="T50">dans</text:span> les registres qui vont avec)</text:p>
        </text:list-item>
        <text:list-item>
          <text:p text:style-name="P37">Un signal <text:span text:style-name="T3">resetn</text:span> qui vient réinitialis<text:span text:style-name="T50">er</text:span> la FSM dans l’état <text:span text:style-name="T3">init</text:span>.</text:p>
        </text:list-item>
        <text:list-item>
          <text:p text:style-name="P37"><text:soft-page-break/>Un signal <text:span text:style-name="T3">change_state</text:span> qui vient déclencher la bascule entre les états (de <text:span text:style-name="T3">init</text:span> vers <text:span text:style-name="T3">red</text:span>, de <text:span text:style-name="T3">red</text:span> vers <text:span text:style-name="T3">green,</text:span> de <text:span text:style-name="T3">green </text:span>vers<text:span text:style-name="T3"> blue</text:span>, <text:span text:style-name="T19">et de </text:span><text:span text:style-name="T5">blue </text:span><text:span text:style-name="T19">vers </text:span><text:span text:style-name="T5">red</text:span><text:span text:style-name="T19">).</text:span></text:p>
          <text:p text:style-name="P39">Ce signal est constitué pour s’activer tous les 3 cycles de clignotement de LED (en pratique, lorsque <text:span text:style-name="T3">n_cycle</text:span> atteint la valeur 6, pour trois cycles de LED « on » et trois cycles de LED « off »).</text:p>
        </text:list-item>
      </text:list>
      <text:p text:style-name="P10">Notre FSM va produire <text:span text:style-name="T47">trois</text:span> signaux, qui vont chacun permettre ou non à une couleur de LED de s’allumer :</text:p>
      <text:list text:style-name="L8">
        <text:list-item>
          <text:p text:style-name="P40">Le signal <text:span text:style-name="T3">r_on</text:span> autorise la LED rouge à clignoter.</text:p>
        </text:list-item>
        <text:list-item>
          <text:p text:style-name="P40">Le signal <text:span text:style-name="T3">g_on</text:span> autorise la LED verte à clignoter.</text:p>
        </text:list-item>
        <text:list-item>
          <text:p text:style-name="P40">Le signal <text:span text:style-name="T11">b_on</text:span><text:span text:style-name="T20"> autorise la LED bleue à clignoter.</text:span></text:p>
        </text:list-item>
      </text:list>
      <text:p text:style-name="P13">Voici le schéma RTL correspondant à cette FSM :</text:p>
      <text:p text:style-name="P10"><draw:frame draw:style-name="fr11" draw:name="Image3" text:anchor-type="char" svg:width="11.887cm" svg:height="11.866cm" draw:z-index="7"><draw:image xlink:href="Pictures/100000010000023200000231A5B461156298948D.png" xlink:type="simple" xlink:show="embed" xlink:actuate="onLoad" draw:mime-type="image/png"/></draw:frame><text:span text:style-name="T20"/></text:p>
      <text:p text:style-name="P10"><text:span text:style-name="T20">6) La FSM décrite à la question précédente, même couplée à une instance de </text:span><text:span text:style-name="T11">Counter_cycle</text:span><text:span text:style-name="T20"> qui avec une logique conditionnel fournit le signal </text:span><text:span text:style-name="T11">change_state</text:span><text:span text:style-name="T20">, ne suffit pas directement à fournir les signaux de sorties pilotant les LEDs.</text:span></text:p>
      <text:p text:style-name="P14"/>
      <text:p text:style-name="P14">En effet, si la FSM autorise où non chaque LED à clignoter, elle ne fournit pas <text:span text:style-name="T21">directement un signal qui permet de piloter le clignotement (qui alterne entre un état haut et un état bas à chaque cycle).</text:span></text:p>
      <text:p text:style-name="P14"><text:soft-page-break/><text:span text:style-name="T21">Un tel signal est cependant facilement trouvable en sortie du module </text:span><text:span text:style-name="T6">Counter_cycle </text:span><text:span text:style-name="T21">: le module fourni</text:span><text:span text:style-name="T50">t</text:span><text:span text:style-name="T21"> la sortie </text:span><text:span text:style-name="T6">n_cycle</text:span><text:span text:style-name="T21"> sur 3 bits (sa valeur ne doit pas dépasser 6), et son dernier bit sui</text:span><text:span text:style-name="T50">t</text:span><text:span text:style-name="T21"> la fréquence voulue pour le clignotement (le bit est haut lors d’un numéro de cycle impair, et bas lors d’un numéro de cycle pair).</text:span></text:p>
      <text:p text:style-name="P15">Il suffit pour chaque couleur de LED de coupler avec un AND ce signal et celui en sortie de la FSM pour piloter la LED correspondante.</text:p>
      <text:p text:style-name="P15"/>
      <text:p text:style-name="P15">De plus, il faut rajouter une rétroaction supplémentaire pour que le module <text:span text:style-name="T3">Counter_cycle</text:span> réinitialise son compte au moment où <text:span text:style-name="T22">un</text:span> changement d’état de la FSM <text:span text:style-name="T22">est déclenché</text:span>. Pour cela, il suffit de relier l’<text:span text:style-name="T47">entrée</text:span> <text:span text:style-name="T7">restart</text:span> <text:span text:style-name="T47">du module au signal </text:span><text:span text:style-name="T9">change_state</text:span>.</text:p>
      <text:p text:style-name="P15"/>
      <text:p text:style-name="P15">L’architecture globale <text:span text:style-name="T32">a</text:span> alors ce schéma RTL :</text:p>
      <text:p text:style-name="P15"><draw:frame draw:style-name="fr3" draw:name="Image4" text:anchor-type="char" svg:width="20.001cm" svg:height="6.567cm" draw:z-index="17"><draw:image xlink:href="Pictures/10000001000004CE00000194AFF02C914AF10355.png" xlink:type="simple" xlink:show="embed" xlink:actuate="onLoad" draw:mime-type="image/png"/></draw:frame></text:p>
      <text:p text:style-name="P15">Cette architecture <text:span text:style-name="T22">a</text:span> pour entrée<text:span text:style-name="T23">s</text:span> :</text:p>
      <text:list text:style-name="L9">
        <text:list-item>
          <text:p text:style-name="P44">Le signal d’horloge <text:span text:style-name="T3">clk</text:span>, sur 1 bit</text:p>
        </text:list-item>
        <text:list-item>
          <text:p text:style-name="P44">Le signal de reset global <text:span text:style-name="T3">resetn</text:span>, sur 1 bit <text:span text:style-name="T50">(c’est sur cette entrée que sera redirigée le signal du bouton restart, car le comportement de restart attendu doit relancer l’ensemble des compteurs ainsi que la FSM, ce qui est donc équivalent à un reset global)</text:span></text:p>
        </text:list-item>
      </text:list>
      <text:p text:style-name="P15">Elle a pour sorties :</text:p>
      <text:list text:style-name="L10">
        <text:list-item>
          <text:p text:style-name="P45">Le signal <text:span text:style-name="T3">led_r,</text:span> sur 1 bit, qui pilote la LED rouge</text:p>
        </text:list-item>
        <text:list-item>
          <text:p text:style-name="P45">Le signal <text:span text:style-name="T3">led_g,</text:span> sur 1 bit, qui pilote la LED verte</text:p>
        </text:list-item>
        <text:list-item>
          <text:p text:style-name="P45">Le signal <text:span text:style-name="T3">led_b,</text:span> sur 1 bit, qui pilote la LED bleue</text:p>
        </text:list-item>
      </text:list>
      <text:p text:style-name="P15">Enfin, elle possède plusieurs signaux internes :</text:p>
      <text:list text:style-name="L11">
        <text:list-item>
          <text:p text:style-name="P46">Le signal <text:span text:style-name="T3">n_cycle</text:span>, sur 3 bits, obtenu à la sortie éponyme du module <text:span text:style-name="T3">Counter_cycle</text:span></text:p>
        </text:list-item>
        <text:list-item>
          <text:p text:style-name="P54">Le signal <text:span text:style-name="T3">led_on</text:span>, sur 1 bit, qui permet de simplifier le pilotage du clignotement des LED, obtenu en récupérant le dernier bit de <text:span text:style-name="T3">n_cycle</text:span></text:p>
        </text:list-item>
        <text:list-item>
          <text:p text:style-name="P46"><text:soft-page-break/>Le signal <text:span text:style-name="T3">change_state</text:span>, sur 1 bit, obtenu par comparaison du signal <text:span text:style-name="T3">n_cycle</text:span> avec la valeur 6</text:p>
        </text:list-item>
        <text:list-item>
          <text:p text:style-name="P46">Le signal <text:span text:style-name="T3">r_on,</text:span> sur 1 bit, obtenu à la sortie éponyme de la FSM</text:p>
        </text:list-item>
        <text:list-item>
          <text:p text:style-name="P46">Le signal <text:span text:style-name="T3">g_on,</text:span> sur 1 bit, obtenu à la sortie éponyme de la FSM</text:p>
        </text:list-item>
        <text:list-item>
          <text:p text:style-name="P46">Le signal <text:span text:style-name="T3">b_on,</text:span> sur 1 bit, obtenu à la sortie éponyme de la FSM</text:p>
        </text:list-item>
      </text:list>
      <text:p text:style-name="P15"/>
      <text:p text:style-name="P16">7) On implémente en VHDL notre FSM dans un nouveau fichier <text:span text:style-name="T3">tp_fsm.vhd</text:span>.</text:p>
      <text:p text:style-name="P16">L’architecture décrite comporte :</text:p>
      <text:list text:style-name="L12">
        <text:list-item>
          <text:p text:style-name="P47">Une instanciation de <text:span text:style-name="T3">Counter_cycle </text:span>(compteur sur 3 bits, pour pouvoir compter jusqu’à 6)</text:p>
        </text:list-item>
        <text:list-item>
          <text:p text:style-name="P47">La description de la FSM</text:p>
          <text:list>
            <text:list-item>
              <text:p text:style-name="P47">La gestion de l’état de la FSM, avec le reset externe et le déclenchement du changement d’état (avec envoie d’un signal de reset vers le C<text:span text:style-name="T3">ounter_cycle</text:span>)</text:p>
            </text:list-item>
            <text:list-item>
              <text:p text:style-name="P47">La configuration des signaux qui autorisent le clignotement de chaque couleur de LED, en fonction de l’état actuel de la FSM</text:p>
            </text:list-item>
          </text:list>
        </text:list-item>
        <text:list-item>
          <text:p text:style-name="P47">La logique combinatoire, qui gère :</text:p>
          <text:list>
            <text:list-item>
              <text:p text:style-name="P47">la condition de changement d’état de la FSM en fonction du compteur de cycle<text:span text:style-name="T50">s</text:span> en sortie de <text:span text:style-name="T3">Counter_cycle, </text:span><text:span text:style-name="T47">qui est également relié à</text:span> <text:span text:style-name="T47">l</text:span>’entrée <text:span text:style-name="T3">res</text:span><text:span text:style-name="T9">tart</text:span><text:span text:style-name="T3"> </text:span><text:span text:style-name="T47">de l’instance</text:span> <text:span text:style-name="T3">Counter_cycle</text:span></text:p>
            </text:list-item>
            <text:list-item>
              <text:p text:style-name="P47">le signal de clignotement (dernier bit du compteur de cycle<text:span text:style-name="T50">s</text:span>)</text:p>
            </text:list-item>
            <text:list-item>
              <text:p text:style-name="P47">les signaux de sorties pour le pilotage des LED (combinaisons du signal de clignotement et des signaux d’autorisation par couleur)</text:p>
            </text:list-item>
          </text:list>
        </text:list-item>
      </text:list>
      <text:p text:style-name="P16"/>
      <text:p text:style-name="P16">8) On écrit un testbench de notre architecture complète dans le fichier <text:span text:style-name="T3">tb_tp_fsm.vhd</text:span>.</text:p>
      <text:p text:style-name="P17"/>
      <text:p text:style-name="P17">On va principalement observer :</text:p>
      <text:list text:style-name="L13">
        <text:list-item>
          <text:p text:style-name="P48">Nos 3 sorties qui pilotent les LEDs (<text:span text:style-name="T3">led_r</text:span>, <text:span text:style-name="T3">led_g</text:span>, <text:span text:style-name="T3">led_b</text:span>) pour vérifier qu’elles clignotent bien en suivant le motif de la FSM (3 fois blanc <text:span text:style-name="T24">→</text:span><text:span text:style-name="T25">3 fois rouge </text:span><text:span text:style-name="T24">→</text:span><text:span text:style-name="T25">3 fois vert </text:span><text:span text:style-name="T24">→</text:span><text:span text:style-name="T25">3 fois bleu </text:span><text:span text:style-name="T24">→</text:span><text:span text:style-name="T25">3 fois rouge </text:span><text:span text:style-name="T24">→</text:span><text:span text:style-name="T25">3 fois vert </text:span><text:span text:style-name="T24">→etc</text:span><text:span text:style-name="T25">).</text:span></text:p>
        </text:list-item>
        <text:list-item>
          <text:p text:style-name="P48"><text:span text:style-name="T25">L’entrée </text:span><text:span text:style-name="T29">resetn</text:span><text:span text:style-name="T25"> qui, lorsqu’elle est activée, doit réinitialiser nos compteurs et la FSM (recommencer à blanc, puis rouge, etc)</text:span></text:p>
        </text:list-item>
      </text:list>
      <text:p text:style-name="P20">On peut aussi observer quelques signaux internes pour vérifier le bon fonctionnement :</text:p>
      <text:list text:style-name="L14">
        <text:list-item>
          <text:p text:style-name="P49"><text:span text:style-name="T25">Le signal </text:span><text:span text:style-name="T29">current_state</text:span><text:span text:style-name="T25">, qui indique l’état actuel de la FSM</text:span></text:p>
        </text:list-item>
        <text:list-item>
          <text:p text:style-name="P49"><text:span text:style-name="T25">Le signal </text:span><text:span text:style-name="T29">next_state</text:span><text:span text:style-name="T25">, qui indique le prochain état de la FSM</text:span></text:p>
        </text:list-item>
        <text:list-item>
          <text:p text:style-name="P49"><text:span text:style-name="T25">Le signal du compteur de cycle</text:span><text:span text:style-name="T28">s</text:span><text:span text:style-name="T25"> </text:span><text:span text:style-name="T29">n_cycle</text:span><text:span text:style-name="T25">, qui compte de 0 à 6 (cette dernière valeur devant être conservée pendant un unique coup d’horloge)</text:span></text:p>
        </text:list-item>
        <text:list-item>
          <text:p text:style-name="P49"><text:span text:style-name="T25">Le signal </text:span><text:span text:style-name="T29">change_state</text:span><text:span text:style-name="T25"> qui indique un changement d’état de la FSM, lorsque </text:span><text:span text:style-name="T29">n_cycle</text:span><text:span text:style-name="T25"> vaut 6</text:span></text:p>
        </text:list-item>
      </text:list>
      <text:p text:style-name="P20"><text:soft-page-break/></text:p>
      <text:p text:style-name="P17"><text:span text:style-name="T25">Pour avoir une durée de calcul raisonnable pour notre simulation, on va prendre un paramètre </text:span><text:span text:style-name="T29">cible</text:span><text:span text:style-name="T25"> valant 100 000 coups d’horloge, soit un cycle de 1 ms.</text:span></text:p>
      <text:p text:style-name="P17"><text:span text:style-name="T25">Notre simulation va commencer par 27,5 ms de fonctionnement « normal », ce qui devrait laisser le temps d’observer 4 états complets de la FSM (chacun durant 6 cycles, soit 6 ms), et le début du 5</text:span><text:span text:style-name="T52">ème</text:span><text:span text:style-name="T25"> ( init/blanc </text:span><text:span text:style-name="T24">→ </text:span><text:span text:style-name="T25">rouge </text:span><text:span text:style-name="T24">→ </text:span><text:span text:style-name="T25">vert </text:span><text:span text:style-name="T24">→ </text:span><text:span text:style-name="T25">bleu </text:span><text:span text:style-name="T24">→ </text:span><text:span text:style-name="T25">rouge).</text:span></text:p>
      <text:p text:style-name="P17"><text:span text:style-name="T25">À t = 27,5 ms, on va activer le signal </text:span><text:span text:style-name="T29">resetn</text:span><text:span text:style-name="T25">, ce qui devrait éteindre toutes les LEDs, réinitialiser la FSM, et conserver à 0 tous les compteurs tant que le signal est maintenu.</text:span></text:p>
      <text:p text:style-name="P17"><text:span text:style-name="T25">À t = 30 ms, on relâche le signal </text:span><text:span text:style-name="T29">resetn</text:span><text:span text:style-name="T25">, ce qui devrait redémarrer un nouveau fonctionnement normal de notre FSM, en commençant à nouveau par l’état initial blanc.</text:span></text:p>
      <text:p text:style-name="P20"/>
      <text:p text:style-name="P20">Voici le chronogramme obtenu lorsqu’on simule le testbench décrit précédemment pendant 60 ms :</text:p>
      <text:p text:style-name="P17"><draw:frame draw:style-name="fr3" draw:name="Image7" text:anchor-type="char" svg:width="20.001cm" svg:height="4.805cm" draw:z-index="8"><draw:image xlink:href="Pictures/1000000000000642000001811D742E0077AC6FC3.png" xlink:type="simple" xlink:show="embed" xlink:actuate="onLoad" draw:mime-type="image/png"/></draw:frame><text:span text:style-name="T25"/></text:p>
      <text:p text:style-name="P20">On observe bien comme prévu le clignotement des LEDs dont les couleurs suivent l’état de la FSM, au rythme du compteur de cycles.</text:p>
      <text:p text:style-name="P17"><text:span text:style-name="T25">Le comportement du système lorsqu’on active le signal </text:span><text:span text:style-name="T29">resetn</text:span><text:span text:style-name="T25"> correspond aussi à ce qui était attendu : tous les signaux internes et de sortie maintenus à ‘0’ tant que </text:span><text:span text:style-name="T29">resetn</text:span><text:span text:style-name="T25"> est activé, et le retour du fonctionnement normal à partir du moment où </text:span><text:span text:style-name="T29">resetn</text:span><text:span text:style-name="T25"> est désactivé.</text:span></text:p>
      <text:p text:style-name="P20"/>
      <text:p text:style-name="P20">Plus précisément, ont peut regarder ce qu’il se passe lors d’un changement d’état de la FSM (ici autour de 6 ms) :</text:p>
      <text:p text:style-name="P20"><draw:frame draw:style-name="fr3" draw:name="Image8" text:anchor-type="char" svg:width="20.001cm" svg:height="5.616cm" draw:z-index="9"><draw:image xlink:href="Pictures/10000000000005500000017E662F124260A66FF5.png" xlink:type="simple" xlink:show="embed" xlink:actuate="onLoad" draw:mime-type="image/png"/></draw:frame></text:p>
      <text:p text:style-name="P17"><text:soft-page-break/><text:span text:style-name="T25">Comme prévu, au premier coup d’horloge après t = 6 ms, la valeur du compteur de cycles passe de 5 à 6, ce qui déclenche immédiatement par logique combinatoire le signal </text:span><text:span text:style-name="T29">change_state</text:span><text:span text:style-name="T25">, et éteint les LEDs qui clignotaient (valeur du compteur de cycles paire).</text:span></text:p>
      <text:p text:style-name="P17"><text:span text:style-name="T25">Au coup d’horloge suivant, la FSM va donc changer d’état et passer de </text:span><text:span text:style-name="T31">init</text:span><text:span text:style-name="T25"> à </text:span><text:span text:style-name="T31">red</text:span><text:span text:style-name="T25">. </text:span><text:span text:style-name="T27">En même temps, on déclenche le restart</text:span><text:span text:style-name="T25"> de notre compteur de cycle</text:span><text:span text:style-name="T27">s</text:span><text:span text:style-name="T25"> : la valeur </text:span><text:span text:style-name="T29">n_cycle</text:span><text:span text:style-name="T25"> repasse à 0 et par logique combinatoire désactive le signal </text:span><text:span text:style-name="T29">change_state</text:span><text:span text:style-name="T25">. La valeur de </text:span><text:span text:style-name="T29">n_cycle</text:span><text:span text:style-name="T25"> reste paire, les LEDs restent donc éteintes.</text:span></text:p>
      <text:p text:style-name="P17"><text:span text:style-name="T25">Enfin, au coup d’horloge suivant, </text:span><text:span text:style-name="T27">puisque </text:span><text:span text:style-name="T25">le signal </text:span><text:span text:style-name="T29">restart</text:span><text:span text:style-name="T25"> </text:span><text:span text:style-name="T27">du compteur de cycles </text:span><text:span text:style-name="T25">est désactivé </text:span><text:span text:style-name="T27">(</text:span><text:span text:style-name="T30">change_state</text:span><text:span text:style-name="T27"> est repassé à ‘0’),</text:span><text:span text:style-name="T25"> le compteur de cycles reprend un fonctionnement normal.</text:span></text:p>
      <text:p text:style-name="P20"/>
      <text:p text:style-name="P20">On a également implémenté des tests automatiques dans notre testbench, pour vérifier que le comportement des sorties LED suit bien ce que nous attendons.</text:p>
      <text:p text:style-name="P20">Tous ces tests ont été vérifiés :</text:p>
      <text:p text:style-name="P17"><draw:frame draw:style-name="fr10" draw:name="Image9" text:anchor-type="char" svg:y="0.041cm" svg:width="6.001cm" svg:height="12.21cm" draw:z-index="1"><draw:image xlink:href="Pictures/100000000000012D00000478768A20E4427D5587.png" xlink:type="simple" xlink:show="embed" xlink:actuate="onLoad" draw:mime-type="image/png"/></draw:frame><draw:frame draw:style-name="fr9" draw:name="Image10" text:anchor-type="char" svg:x="9.13cm" svg:y="0.071cm" svg:width="6.001cm" svg:height="10.479cm" draw:z-index="2"><draw:image xlink:href="Pictures/100000000000012D00000478768A20E4427D5587.png" xlink:type="simple" xlink:show="embed" xlink:actuate="onLoad" draw:mime-type="image/png"/></draw:frame><text:span text:style-name="T25"/></text:p>
      <text:p text:style-name="P20">9) On effectue la synthèse sur Vivado.</text:p>
      <text:p text:style-name="P17"><text:span text:style-name="T25">On obtient la schématique suivante (visible plus clairement dans le fichier</text:span><text:span text:style-name="T29"> Schematique_TP3.pdf</text:span><text:span text:style-name="T25">)</text:span><text:span text:style-name="T29"> </text:span><text:span text:style-name="T25"> :</text:span></text:p>
      <text:p text:style-name="P17"><draw:frame draw:style-name="fr3" draw:name="Image12" text:anchor-type="char" svg:width="20.001cm" svg:height="5.584cm" draw:z-index="10"><draw:image xlink:href="Pictures/10000000000008D000000276A43CF5FC879EE173.png" xlink:type="simple" xlink:show="embed" xlink:actuate="onLoad" draw:mime-type="image/png"/></draw:frame><text:soft-page-break/><text:span text:style-name="T25"/></text:p>
      <text:p text:style-name="P17"><text:span text:style-name="T25">Sur cette schématique, la partie correspondant à l’instanciation du </text:span><text:span text:style-name="T29">Counter_unit</text:span><text:span text:style-name="T25"> n’est pas développée, car elle correspond à ce qui avait été développé dans le TP2, pour toute la partie compteur et comparateur. La seule différence est le nombre de registre nécessaire à l’enregistrement de la valeur du compteur, qui varie maintenant en fonction de la cible du compteur, et qui nécessite 27 bits dans notre cas où la cible vaut 1</text:span><text:span text:style-name="T27">25</text:span><text:span text:style-name="T25"> 000 000 coups d’horloge, soit 1 seconde.</text:span></text:p>
      <text:p text:style-name="P20">Sur le reste de la schématique, on observe, de gauche à droite :</text:p>
      <text:list text:style-name="L15">
        <text:list-item>
          <text:p text:style-name="P50"><text:span text:style-name="T25">Les entrées, avec les 2 buffer</text:span><text:span text:style-name="T28">s</text:span><text:span text:style-name="T25"> d’entrée IBUF (</text:span><text:span text:style-name="T29">resetn_IBUF_inst</text:span><text:span text:style-name="T25"> et </text:span><text:span text:style-name="T29">clk_IBUF_inst</text:span><text:span text:style-name="T25">) et le buffer d’horloge BUFG (</text:span><text:span text:style-name="T29">clk_IBUF_inst</text:span><text:span text:style-name="T25">)</text:span></text:p>
        </text:list-item>
        <text:list-item>
          <text:p text:style-name="P50"><text:span text:style-name="T27">2</text:span><text:span text:style-name="T25"> registres FDCE, qui stockent les 2 bits de l’état de la FSM (</text:span><text:span text:style-name="T29">FSM_sequential_current_state_reg[0]</text:span><text:span text:style-name="T25"> et </text:span><text:span text:style-name="T29">FSM_sequential_current_state_reg[1]</text:span><text:span text:style-name="T25">)</text:span></text:p>
        </text:list-item>
        <text:list-item>
          <text:p text:style-name="P50"><text:span text:style-name="T25">Le bloc nommé </text:span><text:span text:style-name="T29">counter_cycle_1</text:span><text:span text:style-name="T25"> qui comporte à la fois </text:span></text:p>
          <text:list>
            <text:list-item>
              <text:p text:style-name="P50"><text:span text:style-name="T27">L</text:span><text:span text:style-name="T25">es composants qui constituent l’instance de </text:span><text:span text:style-name="T29">Counter_cycle, </text:span><text:span text:style-name="T25">c’est à dire :</text:span></text:p>
              <text:list>
                <text:list-item>
                  <text:p text:style-name="P50"><text:span text:style-name="T27">L</text:span><text:span text:style-name="T25">’instance de </text:span><text:span text:style-name="T29">Counter_unit</text:span><text:span text:style-name="T25"> (non développée ici, comme expliquée précédemment).</text:span></text:p>
                </text:list-item>
                <text:list-item>
                  <text:p text:style-name="P50"><text:span text:style-name="T25">3 registres FDCE (</text:span><text:span text:style-name="T29">n_cycle_in_reg[0]</text:span><text:span text:style-name="T25"> à </text:span><text:span text:style-name="T29">n_cycle_in_reg[2]</text:span><text:span text:style-name="T25">) qui stockent les 3 bits du signal compteur </text:span><text:span text:style-name="T29">n_cycle.</text:span></text:p>
                </text:list-item>
                <text:list-item>
                  <text:p text:style-name="P51"><text:span text:style-name="T25">3 tables de vérité </text:span><text:span text:style-name="T27">de taille 4 </text:span><text:span text:style-name="T25">LUT</text:span><text:span text:style-name="T27">4 (</text:span><text:span text:style-name="T29">n_cycle_in[0]_i_1</text:span><text:span text:style-name="T25"> </text:span><text:span text:style-name="T27">à </text:span><text:span text:style-name="T29">n_cycle_in[</text:span><text:span text:style-name="T30">2</text:span><text:span text:style-name="T29">]_i_1</text:span><text:span text:style-name="T30">)</text:span><text:span text:style-name="T25"> qui permettent le calcul de l’actualisation de </text:span><text:span text:style-name="T27">chaque bit de</text:span><text:span text:style-name="T25"> </text:span><text:span text:style-name="T29">n_cycle. </text:span><text:span text:style-name="T27">Chacune de ces LUT4 prends en entrée les 3 bits de </text:span><text:span text:style-name="T30">n_cycle</text:span><text:span text:style-name="T27"> (ancienne valeur) et le signal </text:span><text:span text:style-name="T30">end_counter.</text:span></text:p>
                  <text:p text:style-name="P53"><text:span text:style-name="T25">On remarquera que le cas de restart du compteur est bien inclus dans ces LUT, puisque le restart est déclenché par un état particulier de </text:span><text:span text:style-name="T29">n_cycle</text:span><text:span text:style-name="T25">.</text:span></text:p>
                </text:list-item>
              </text:list>
            </text:list-item>
            <text:list-item>
              <text:p text:style-name="P56"><text:span text:style-name="T47">L</text:span>e reste des composants qui constituent la FSM :</text:p>
              <text:list>
                <text:list-item>
                  <text:p text:style-name="P50"><text:span text:style-name="T25">2 tables de vérité de tailles 5 LUT5 (</text:span><text:span text:style-name="T29">FSM_sequential_current_state[0]_i_1</text:span><text:span text:style-name="T25"> et </text:span><text:span text:style-name="T29">FSM_sequential_current_state[1]_i_1) </text:span><text:span text:style-name="T25">qui calculent l’état suivant de la FSM (grâce aux deux entrées de la LUT5 connectées au 2 bits de l’état actuel de la FSM) lorsque </text:span><text:span text:style-name="T29">n_cycle</text:span><text:span text:style-name="T25"> (dont les 3 bits sont aussi en entrées de la LUT5) est égal à 6, et garde l’état actuel sinon.</text:span></text:p>
                </text:list-item>
                <text:list-item>
                  <text:p text:style-name="P51"><text:span text:style-name="T25">3 tables de vérité de taille 2 ou 3 (1 LUT3, </text:span><text:span text:style-name="T29">led_b_OBUF_inst_i</text:span><text:span text:style-name="T30">_1</text:span><text:span text:style-name="T29">,</text:span><text:span text:style-name="T25"> et 2 LUT2, </text:span><text:span text:style-name="T29">led_g_OBUF_inst_i</text:span><text:span text:style-name="T30">_1</text:span><text:span text:style-name="T25"> et <text:s/></text:span><text:span text:style-name="T29">led_r_OBUF_inst_i</text:span><text:span text:style-name="T30">_1</text:span><text:span text:style-name="T25">) qui active</text:span><text:span text:style-name="T28">nt</text:span><text:span text:style-name="T25"> les sorties LEDs </text:span><text:soft-page-break/><text:span text:style-name="T25">lorsque </text:span><text:span text:style-name="T29">n_cycle</text:span><text:span text:style-name="T25">(0) (1 des entrée</text:span><text:span text:style-name="T28">s</text:span><text:span text:style-name="T25"> de chacun</text:span><text:span text:style-name="T28">e</text:span><text:span text:style-name="T25"> de ces LUT) est haut et en fonction de l’état de la FSM (en fonction des couleurs, peut se décider avec un seul ou les 2 bits de l’état).</text:span></text:p>
                </text:list-item>
              </text:list>
            </text:list-item>
          </text:list>
        </text:list-item>
        <text:list-item>
          <text:p text:style-name="P50"><text:span text:style-name="T25">Les 3 sorties, avec les 3 buffers de sorties OBUF (</text:span><text:span text:style-name="T29">led_b_OBUF_inst</text:span><text:span text:style-name="T25">, </text:span><text:span text:style-name="T29">led_g_OBUF_inst </text:span><text:span text:style-name="T25">et </text:span><text:span text:style-name="T29">led_r_OBUF_inst</text:span><text:span text:style-name="T25">).</text:span></text:p>
        </text:list-item>
      </text:list>
      <text:p text:style-name="P20"/>
      <text:p text:style-name="P18"><text:span text:style-name="T25">Le rapport de synthèse (voir fichier complet </text:span><text:span text:style-name="T29">tp_fsm.vds</text:span><text:span text:style-name="T25">) </text:span><text:span text:style-name="T27">indique bien qu’une FSM a été détectée dans notre architecture </text:span><text:span text:style-name="T25">:</text:span></text:p>
      <text:p text:style-name="P18"><draw:frame draw:style-name="fr6" draw:name="Image20" text:anchor-type="char" svg:x="0cm" svg:y="-0.106cm" svg:width="17cm" svg:height="3.782cm" draw:z-index="11"><draw:image xlink:href="Pictures/10000000000002BD0000009CF34096DDA16D5865.png" xlink:type="simple" xlink:show="embed" xlink:actuate="onLoad" draw:mime-type="image/png"/></draw:frame><text:span text:style-name="T25"/></text:p>
      <text:p text:style-name="P18"><text:span text:style-name="T27">Le rapport </text:span><text:span text:style-name="T25">donne les ressources utilisées suivantes :</text:span></text:p>
      <text:p text:style-name="P17"><text:span text:style-name="T25">En plus des composants explicités d</text:span><draw:frame draw:style-name="fr8" draw:name="Image13" text:anchor-type="char" svg:width="4.471cm" svg:height="6.8cm" draw:z-index="12"><draw:image xlink:href="Pictures/10000000000000A900000101B002AC16B8C61913.png" xlink:type="simple" xlink:show="embed" xlink:actuate="onLoad" draw:mime-type="image/png"/></draw:frame><text:span text:style-name="T25">ans la description de la schématique, le rapport dénombre aussi les ressources nécessaires à l’instance de </text:span><text:span text:style-name="T29">Counter_unit</text:span><text:span text:style-name="T25">, c’est à dire 27 registres FDCE pour les 27 bits du compteur (pour un total de 32 avec les </text:span><text:span text:style-name="T27">5</text:span><text:span text:style-name="T25"> explicités précédemment), 7 CARRY4 et 28 LUT2 pour l’incrémentation/reset du compteur (pour un total de 3</text:span><text:span text:style-name="T27">0</text:span><text:span text:style-name="T25"> LUT2 avec les </text:span><text:span text:style-name="T27">2</text:span><text:span text:style-name="T25"> explicitées précédemment), 1 LUT3 + </text:span><text:span text:style-name="T27">3</text:span><text:span text:style-name="T25"> LUT4 + 3 LUT6 pour la comparaison du compteur avec la cible (pour <text:s/>un total de </text:span><text:span text:style-name="T27">2</text:span><text:span text:style-name="T25"> LUT3, </text:span><text:span text:style-name="T27">6</text:span><text:span text:style-name="T25"> LUT4 avec l</text:span><text:span text:style-name="T27">a</text:span><text:span text:style-name="T25"> LUT3 et l</text:span><text:span text:style-name="T27">es 3 </text:span><text:span text:style-name="T25">LUT4 explicitées précédemment).</text:span></text:p>
      <text:p text:style-name="P20"/>
      <text:p text:style-name="P17"><text:span text:style-name="T25">10) Dans notre fichier de contraintes </text:span><text:span text:style-name="T29">Cora-Z7-10-Master.xdc,</text:span><text:span text:style-name="T25"> on ajoute :</text:span></text:p>
      <text:list text:style-name="L16">
        <text:list-item>
          <text:p text:style-name="P57">Les deux lignes pour définir notre horloge</text:p>
        </text:list-item>
        <text:list-item>
          <text:p text:style-name="P52"><draw:frame draw:style-name="fr7" draw:name="Image14" text:anchor-type="char" svg:width="16.365cm" svg:height="0.887cm" draw:z-index="13"><draw:image xlink:href="Pictures/100000000000027300000022C8DAE96E51AA5B56.png" xlink:type="simple" xlink:show="embed" xlink:actuate="onLoad" draw:mime-type="image/png"/></draw:frame><text:span text:style-name="T25">Une ligne pour chacune des 3 sorties LED</text:span></text:p>
        </text:list-item>
        <text:list-item>
          <text:p text:style-name="P52"><draw:frame draw:style-name="fr7" draw:name="Image15" text:anchor-type="char" svg:width="16.365cm" svg:height="1.072cm" draw:z-index="3"><draw:image xlink:href="Pictures/10000000000003280000003569F7F52A67533F59.png" xlink:type="simple" xlink:show="embed" xlink:actuate="onLoad" draw:mime-type="image/png"/></draw:frame><text:soft-page-break/><text:span text:style-name="T25">Une ligne pour l’</text:span><text:span text:style-name="T26">entrée du</text:span><text:span text:style-name="T25"> bouton de reset</text:span></text:p>
        </text:list-item>
      </text:list>
      <text:p text:style-name="P17"><draw:frame draw:style-name="fr6" draw:name="Image16" text:anchor-type="char" svg:x="0cm" svg:y="0cm" svg:width="17cm" svg:height="0.413cm" draw:z-index="4"><draw:image xlink:href="Pictures/100000000000030C0000001340D6E761C9F73DB6.png" xlink:type="simple" xlink:show="embed" xlink:actuate="onLoad" draw:mime-type="image/png"/></draw:frame><text:span text:style-name="T25"/></text:p>
      <text:p text:style-name="P17"><text:span text:style-name="T25">On notera qu’</text:span><text:span text:style-name="T27">on </text:span><text:span text:style-name="T28">a </text:span><text:span text:style-name="T27">ajout</text:span><text:span text:style-name="T28">é</text:span><text:span text:style-name="T27"> un deuxième fichier de contraintes</text:span><text:span text:style-name="T25"> (</text:span><text:span text:style-name="T30">TP3_</text:span><text:span text:style-name="T29">Debug.xdc)</text:span><text:span text:style-name="T25"> </text:span><text:span text:style-name="T27">qui </text:span><text:span text:style-name="T25">comporte les éléments nécessaires automatiquement générés pour la gestion debug des sondes ILA.</text:span></text:p>
      <text:p text:style-name="P20"/>
      <text:p text:style-name="P20">11) On lance l’implémentation sur Vivado.</text:p>
      <text:p text:style-name="P22"><text:span text:style-name="T46">On analyse le rapport de timing (voir fichier complet </text:span><text:span text:style-name="T12">tp_fsm_timing_summary_routed.rpt</text:span><text:span text:style-name="T46">).</text:span></text:p>
      <text:p text:style-name="P22"/>
      <text:p text:style-name="P22">Le récapitulatif de timing obtenu est le suivant :</text:p>
      <text:p text:style-name="P22"><draw:frame draw:style-name="fr3" draw:name="Image17" text:anchor-type="char" svg:width="20.001cm" svg:height="1.838cm" draw:z-index="14"><draw:image xlink:href="Pictures/10000000000005C60000008862AD6CD7E735566D.png" xlink:type="simple" xlink:show="embed" xlink:actuate="onLoad" draw:mime-type="image/png"/></draw:frame></text:p>
      <text:p text:style-name="P21"><text:span text:style-name="T33">On observe notamment que :</text:span></text:p>
      <text:list text:style-name="L17">
        <text:list-item>
          <text:p text:style-name="P58"><text:span text:style-name="T33">la valeur de </text:span><text:span text:style-name="T37">Worst</text:span><text:span text:style-name="T36"> Negative Slack (</text:span><text:span text:style-name="T38">W</text:span><text:span text:style-name="T36">NS)</text:span><text:span text:style-name="T39"> </text:span><text:span text:style-name="T40">vaut </text:span><text:span text:style-name="T41">1</text:span><text:span text:style-name="T40">,</text:span><text:span text:style-name="T41">902</text:span><text:span text:style-name="T40"> ns, ce qui est positif et indique qu</text:span><text:span text:style-name="T33">’</text:span><text:span text:style-name="T44">il n’y a </text:span><text:span text:style-name="T45">pas de</text:span><text:span text:style-name="T44"> violation de set up</text:span><text:span text:style-name="T33">.</text:span></text:p>
        </text:list-item>
        <text:list-item>
          <text:p text:style-name="P58"><text:span text:style-name="T34">La valeur </text:span><text:span text:style-name="T33">de </text:span><text:span text:style-name="T38">Worst</text:span><text:span text:style-name="T36"> Hold Slack (</text:span><text:span text:style-name="T38">W</text:span><text:span text:style-name="T36">HS) </text:span><text:span text:style-name="T40">vaut 0,0</text:span><text:span text:style-name="T41">21</text:span><text:span text:style-name="T40"> ns, ce qui est positif et indique qu’</text:span><text:span text:style-name="T42">il n’y a pas de violation de hold</text:span><text:span text:style-name="T43">.</text:span></text:p>
        </text:list-item>
      </text:list>
      <text:p text:style-name="P23"/>
      <text:p text:style-name="P24">Le récapitulatif d’horloge est le suivant :</text:p>
      <text:p text:style-name="P22"><draw:frame draw:style-name="fr3" draw:name="Image18" text:anchor-type="char" svg:width="20.001cm" svg:height="3.059cm" draw:z-index="15"><draw:image xlink:href="Pictures/10000000000003F50000009B9C807E5D0A64F61D.png" xlink:type="simple" xlink:show="embed" xlink:actuate="onLoad" draw:mime-type="image/png"/></draw:frame><text:span text:style-name="T33"/></text:p>
      <text:p text:style-name="P22"><text:span text:style-name="T33">L’horloge système </text:span><text:span text:style-name="T36">sys_clk_pin </text:span><text:span text:style-name="T33">est bien configurée selon nos spécifications initiales : période de </text:span><text:span text:style-name="T35">8</text:span> ns (soit une fréquence de 1<text:span text:style-name="T49">25</text:span> MHz), et signal carré (même demi-période de <text:span text:style-name="T49">4</text:span> ns pour les crêtes <text:s/>haute et basse du signal).</text:p>
      <text:p text:style-name="Text_20_body"/>
      <text:p text:style-name="Text_20_body">Le chemin critique présenté par le rapport est le suivant :</text:p>
      <text:p text:style-name="Text_20_body"><draw:frame draw:style-name="fr5" draw:name="Image19" text:anchor-type="char" svg:width="17cm" svg:height="9.811cm" draw:z-index="16"><draw:image xlink:href="Pictures/1000000000000398000002136D87FD8BE2A7EC87.png" xlink:type="simple" xlink:show="embed" xlink:actuate="onLoad" draw:mime-type="image/png"/></draw:frame><text:soft-page-break/>On remarque que le slack de ce chemin critique est à environ 24 % d’une période. C’est supérieur à la marge de 20 % qu’on veut avoir pour s’assurer d’un bon fonctionnement de notre système.</text:p>
      <text:p text:style-name="P25"/>
      <text:p text:style-name="P25">12) <text:span text:style-name="T50">Sur Vivado, on génère le bitstream correspondant à notre implémentation, et on programme notre carte avec.</text:span></text:p>
      <text:p text:style-name="P25"/>
      <text:p text:style-name="P60">La vidéo <text:span text:style-name="T3">Démo_FSM.mp4</text:span> présente 40 secondes de fonctionnement de la carte programmée.</text:p>
      <text:p text:style-name="P60">La vidéo commence au moment où on relâche le bouton de restart, la carte est donc dans son état initial.</text:p>
      <text:p text:style-name="P60">Les 25 premières secondes montrent un fonctionnement normal de la carte : </text:p>
      <text:list text:style-name="L18">
        <text:list-item>
          <text:p text:style-name="P62"><text:span text:style-name="T50">on commence dans l’état </text:span><text:span text:style-name="T10">init</text:span><text:span text:style-name="T50"> de la FSM, où la LED clignote (1 s off, 1 s on) trois fois en blanc,</text:span></text:p>
        </text:list-item>
        <text:list-item>
          <text:p text:style-name="P62"><text:span text:style-name="T50">puis passe dans l’état </text:span><text:span text:style-name="T10">red</text:span><text:span text:style-name="T50"> et clignote trois fois en rouge,</text:span></text:p>
        </text:list-item>
        <text:list-item>
          <text:p text:style-name="P62"><text:span text:style-name="T50">puis dans l’état </text:span><text:span text:style-name="T10">green</text:span><text:span text:style-name="T50"> et clignote trois fois en vert,</text:span></text:p>
        </text:list-item>
        <text:list-item>
          <text:p text:style-name="P62"><text:span text:style-name="T50">puis dans l’état </text:span><text:span text:style-name="T10">blue</text:span><text:span text:style-name="T50"> et clignote trois fois en bleu,</text:span></text:p>
        </text:list-item>
        <text:list-item>
          <text:p text:style-name="P61">avant de repasser à l’état <text:span text:style-name="T3">red</text:span>, où on a le temps de voir l’allumage du premier clignotement rouge.</text:p>
        </text:list-item>
      </text:list>
      <text:p text:style-name="P60">À la 25<text:span text:style-name="T51">ème</text:span> seconde, on presse le bouton restart : la LED, à ce moment allumée en rouge s’éteint immédiatement. La LED reste éteinte tout le temps où le bouton est pressé.</text:p>
      <text:p text:style-name="P60">Le bouton est relâché à la 28<text:span text:style-name="T51">ème</text:span><text:span text:style-name="T53"> seconde : le fonctionnement normal recommence depuis l’état initial, à la seconde suivante la LED s’allume en blanc. Durant les 12 secondes finales de la vidéo, </text:span><text:soft-page-break/><text:span text:style-name="T53">on observe à nouveau ce fonctionnement normal, avec 3 clignotements blancs puis 3 clignotements rouges.</text:span></text:p>
      <text:p text:style-name="P60"/>
      <text:p text:style-name="P60">En plus de cette évaluation visuel, on effectue plusieurs tests avec la ILA. À noter, un problème de Vivado m’empêche de faire apparaître dans la fenêtre Waveform le bit (2) du signal <text:span text:style-name="T3">n_cycle</text:span><text:span text:style-name="T13">.</text:span></text:p>
      <text:p text:style-name="P60">Le premier test est trigger lorsque l’état de la FSM passe à <text:span text:style-name="T3">red</text:span>, mis en place pendant un restart :</text:p>
      <text:p text:style-name="P60"><draw:frame draw:style-name="fr3" draw:name="Image22" text:anchor-type="char" svg:width="20.001cm" svg:height="3.24cm" draw:z-index="21"><draw:image xlink:href="Pictures/1000000000000601000000F9A4BEAB6460F15B6D.png" xlink:type="simple" xlink:show="embed" xlink:actuate="onLoad" draw:mime-type="image/png"/></draw:frame>Comme on l’avait simulé, le changement d’état de la FSM et le reset du compteur de cycles ont lieu un coup d’horloge après que le compteur de cycles atteigne la valeur 6, incrémentation qui a elle même lieu un coup d’horloge après la montée du signal <text:span text:style-name="T3">end_counter</text:span><text:span text:style-name="T13">.</text:span></text:p>
      <text:p text:style-name="P60"><text:span text:style-name="T13">On remarquera que l’extinction des LEDs n’a pas lieu au moment exact où l’état de la FSM change, mais au coup d’horloge précédent, quand le compteur de cycles atteint une valeur paire (de 6).</text:span></text:p>
      <text:p text:style-name="P60"><text:span text:style-name="T13"/></text:p>
      <text:p text:style-name="P60"><text:span text:style-name="T13">Le second test est trigger par un front montant du signal </text:span><text:span text:style-name="T3">led_on,</text:span><text:span text:style-name="T13"> pendant un cycle d’initialisation :</text:span></text:p>
      <text:p text:style-name="P60"><draw:frame draw:style-name="fr3" draw:name="Image23" text:anchor-type="char" svg:width="20.001cm" svg:height="3.374cm" draw:z-index="20"><draw:image xlink:href="Pictures/10000000000005B8000000F7414113F0CDE33373.png" xlink:type="simple" xlink:show="embed" xlink:actuate="onLoad" draw:mime-type="image/png"/></draw:frame><text:span text:style-name="T13">On observe ici que l’incrémentation du compteur de cycles (qui passe de 0 à 1) est déclenchée par le la montée du signal </text:span><text:span text:style-name="T3">end_counter</text:span><text:span text:style-name="T13">.</text:span></text:p>
      <text:p text:style-name="P60"><text:span text:style-name="T13">Le passage du compteur de cycles à une valeur impaire active le clignotement des LED. La couleur des LEDs qui s’allument est gouvernée par l’état de la FSM : dans l’état </text:span><text:span text:style-name="T3">init</text:span><text:span text:style-name="T13">, ce sont toutes les LEDs qui s’allume.</text:span></text:p>
      <text:p text:style-name="P60"><text:span text:style-name="T13">Si on lance un test avec le même trigger alors que la FSM est dans un autre état, le résultat serait différent :</text:span></text:p>
      <text:p text:style-name="P60"><draw:frame draw:style-name="fr3" draw:name="Image24" text:anchor-type="char" svg:width="20.001cm" svg:height="3.734cm" draw:z-index="22"><draw:image xlink:href="Pictures/100000000000053B000000FA2ED811DB5FFE226D.png" xlink:type="simple" xlink:show="embed" xlink:actuate="onLoad" draw:mime-type="image/png"/></draw:frame><text:span text:style-name="T13">Ici pendant un état </text:span><text:span text:style-name="T3">red</text:span><text:span text:style-name="T13">, c’est uniquement la LED rouge qui s’allume.</text:span></text:p>
      <text:p text:style-name="P60"><text:soft-page-break/><text:span text:style-name="T13">Le test suivant est trigger par un front montant du signal </text:span><text:span text:style-name="T3">resetn</text:span><text:span text:style-name="T13">, et on va appuyer sur le bouton restart pendant qu’une des LED est allumée.</text:span></text:p>
      <text:p text:style-name="P60"><draw:frame draw:style-name="fr2" draw:name="Image25" text:anchor-type="char" svg:y="0cm" svg:width="20.001cm" svg:height="3.237cm" draw:z-index="23"><draw:image xlink:href="Pictures/1000000000000608000000FA55C560965C60BFE8.png" xlink:type="simple" xlink:show="embed" xlink:actuate="onLoad" draw:mime-type="image/png"/></draw:frame><text:span text:style-name="T13">On observe qu’au moment ou le bouton est enfoncé, l’ensemble du système se reset : l’état de la FSM repasse à </text:span><text:span text:style-name="T3">init</text:span><text:span text:style-name="T13">, la LED bleue qui était allumée s’éteint, le compteur de cycles repasse à 0.</text:span></text:p>
      <text:p text:style-name="P25"/>
      <text:p text:style-name="P60">Enfin, on vérifie également la durée de nos cycles avec une mesure à l’oscilloscope.</text:p>
      <text:p text:style-name="P60">Notre mesure est effectué au pin d’entrée de la LED bleue. Selon la documentation de notre carte Cora Z7, le signal de sortie de FPGA qui pilote les LED est inversé : lorsque le signal de sortie est haut, il est alors bas en sortie de la LED qui se retrouve sous tension, et donc allumée.</text:p>
      <text:p text:style-name="P60">Nous mesurons le signal suivant (division verticale de 2 V, division horizontale de 1 s) :</text:p>
      <text:p text:style-name="P60"><draw:frame draw:style-name="fr4" draw:name="Image21" text:anchor-type="char" svg:x="-1.644cm" svg:y="-0.113cm" svg:width="20.29cm" svg:height="8.791cm" draw:z-index="19"><draw:image xlink:href="Pictures/1000000000000A00000005A08D7E2D8FFAF26E18.png" xlink:type="simple" xlink:show="embed" xlink:actuate="onLoad" draw:mime-type="image/png"/></draw:frame>On observe bien que lorsque la LED bleue est éteinte, le signal à l’entrée de la LED est haut (à 3,3 V, ce qui correspond bien à du LVCMOS33), ce qui correspond à un signal de sortie bas.</text:p>
      <text:p text:style-name="P60">Pendant trois périodes de 1 s, notre signal passe à 0 V : cela correspond aux trois clignotements allumés en bleu pour cet état de la FSM, lorsque le signal de sortie est haut.</text:p>
      <text:p text:style-name="P60">Sur cet enregistrement de notre signal, on observe que la période allumée de la LED, ainsi que la période éteinte entre deux clignotements valent bien 1 s à chaque fois. Cela confirme notre réglage du couple horloge – paramètre de <text:span text:style-name="T3">cible</text:span><text:span text:style-name="T13"> de notre </text:span><text:span text:style-name="T3">Counter_unit</text:span><text:span text:style-name="T13"> pour obtenir des cycles de 1 seconde.</text:span></text:p>
      <text:p text:style-name="P60"><text:span text:style-name="T13"/></text:p>
      <text:p text:style-name="P60"><text:span text:style-name="T13">Au final, que ce soit en visuel, via l’ILA ou à l’oscilloscope, la carte semble parfaitement fonctionn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092a72"/>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7-08T15:52:28.831000000</meta:creation-date>
    <dc:date>2026-07-17T14:27:15.208000000</dc:date>
    <meta:editing-duration>P2DT5H42M49S</meta:editing-duration>
    <meta:editing-cycles>11</meta:editing-cycles>
    <meta:generator>LibreOffice/7.5.8.2$Windows_X86_64 LibreOffice_project/f718d63693263970429a68f568db6046aaa9df01</meta:generator>
    <meta:document-statistic meta:table-count="0" meta:image-count="25" meta:object-count="0" meta:page-count="15" meta:paragraph-count="171" meta:word-count="3769" meta:character-count="21559" meta:non-whitespace-character-count="18026"/>
  </office:meta>
</office:document-meta>
</file>