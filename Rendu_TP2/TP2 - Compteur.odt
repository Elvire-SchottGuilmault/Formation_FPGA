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7000001BBF358449EB773140B.png" manifest:media-type="image/png"/>
  <manifest:file-entry manifest:full-path="Pictures/1000000100000384000000F2BEB464E29DA18C74.png" manifest:media-type="image/png"/>
  <manifest:file-entry manifest:full-path="Pictures/100000000000018E0000008D619C589E4DF46624.png" manifest:media-type="image/png"/>
  <manifest:file-entry manifest:full-path="Pictures/10000001000003AD00000121A9BF53DA30D47783.png" manifest:media-type="image/png"/>
  <manifest:file-entry manifest:full-path="Pictures/100000000000069300000339390746CD4B368342.png" manifest:media-type="image/png"/>
  <manifest:file-entry manifest:full-path="Pictures/100000000000068B000003418E7F1BF70905A8B2.png" manifest:media-type="image/png"/>
  <manifest:file-entry manifest:full-path="Pictures/10000001000004880000040773F40533ABE42BC6.png" manifest:media-type="image/png"/>
  <manifest:file-entry manifest:full-path="Pictures/10000000000005E2000000A5DC33192A54F59C80.png" manifest:media-type="image/png"/>
  <manifest:file-entry manifest:full-path="Pictures/100000000000065B0000039D37E1F121A44484CE.png" manifest:media-type="image/png"/>
  <manifest:file-entry manifest:full-path="Pictures/10000000000000BD000000F552A138FCE8F586A1.png" manifest:media-type="image/png"/>
  <manifest:file-entry manifest:full-path="Pictures/100000010000017700000247C491A0A3A876B071.png" manifest:media-type="image/png"/>
  <manifest:file-entry manifest:full-path="Pictures/100000000000075400000082A7B9E7542BD8468D.png" manifest:media-type="image/png"/>
  <manifest:file-entry manifest:full-path="Pictures/10000000000003EA0000009F9444FF711B9879FC.png" manifest:media-type="image/png"/>
  <manifest:file-entry manifest:full-path="Pictures/100000000000039200000172B243C3CBA51D3402.png" manifest:media-type="image/png"/>
  <manifest:file-entry manifest:full-path="Pictures/1000000000000757000000811124888CEC91684B.png" manifest:media-type="image/png"/>
  <manifest:file-entry manifest:full-path="Pictures/1000000000000757000000864A18890D8F6EFA50.png" manifest:media-type="image/png"/>
  <manifest:file-entry manifest:full-path="Pictures/100000000000075800000086E7F160A53D3106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8.996cm" fo:margin-left="2.873cm" table:align="left"/>
    </style:style>
    <style:style style:name="Tableau1.A" style:family="table-column">
      <style:table-column-properties style:column-width="2.388cm"/>
    </style:style>
    <style:style style:name="Tableau1.B" style:family="table-column">
      <style:table-column-properties style:column-width="2.693cm"/>
    </style:style>
    <style:style style:name="Tableau1.C" style:family="table-column">
      <style:table-column-properties style:column-width="3.914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officeooo:rsid="00130610" officeooo:paragraph-rsid="0009208b"/>
    </style:style>
    <style:style style:name="P2" style:family="paragraph" style:parent-style-name="Text_20_body">
      <style:text-properties officeooo:paragraph-rsid="0009208b"/>
    </style:style>
    <style:style style:name="P3" style:family="paragraph" style:parent-style-name="Title">
      <style:text-properties officeooo:paragraph-rsid="0009208b"/>
    </style:style>
    <style:style style:name="P4" style:family="paragraph" style:parent-style-name="Text_20_body">
      <style:text-properties officeooo:rsid="0009208b" officeooo:paragraph-rsid="0009208b"/>
    </style:style>
    <style:style style:name="P5" style:family="paragraph" style:parent-style-name="Text_20_body">
      <style:text-properties style:font-name="Liberation Serif" officeooo:rsid="0009208b" officeooo:paragraph-rsid="0009208b" style:font-name-asian="Liberation Serif" style:font-name-complex="Liberation Serif"/>
    </style:style>
    <style:style style:name="P6" style:family="paragraph" style:parent-style-name="Text_20_body">
      <style:text-properties fo:font-style="normal" officeooo:rsid="0009208b" officeooo:paragraph-rsid="0009208b" style:font-style-asian="normal" style:font-style-complex="normal"/>
    </style:style>
    <style:style style:name="P7" style:family="paragraph" style:parent-style-name="Text_20_body">
      <style:text-properties fo:font-style="normal" officeooo:rsid="000a3725" officeooo:paragraph-rsid="000a3725" style:font-style-asian="normal" style:font-style-complex="normal"/>
    </style:style>
    <style:style style:name="P8" style:family="paragraph" style:parent-style-name="Text_20_body">
      <style:text-properties fo:font-style="normal" officeooo:rsid="000a38d0" officeooo:paragraph-rsid="000a38d0" style:font-style-asian="normal" style:font-style-complex="normal"/>
    </style:style>
    <style:style style:name="P9" style:family="paragraph" style:parent-style-name="Text_20_body">
      <style:text-properties fo:font-style="normal" officeooo:rsid="000c0b32" officeooo:paragraph-rsid="000c0b32" style:font-style-asian="normal" style:font-style-complex="normal"/>
    </style:style>
    <style:style style:name="P10" style:family="paragraph" style:parent-style-name="Text_20_body">
      <style:text-properties fo:font-style="normal" officeooo:rsid="000c0b32" officeooo:paragraph-rsid="000d1fc8" style:font-style-asian="normal" style:font-style-complex="normal"/>
    </style:style>
    <style:style style:name="P11" style:family="paragraph" style:parent-style-name="Text_20_body">
      <style:text-properties fo:font-style="normal" officeooo:rsid="000d1fc8" officeooo:paragraph-rsid="000d1fc8" style:font-style-asian="normal" style:font-style-complex="normal"/>
    </style:style>
    <style:style style:name="P12" style:family="paragraph" style:parent-style-name="Text_20_body">
      <style:text-properties fo:font-style="italic" officeooo:rsid="0009208b" officeooo:paragraph-rsid="0009208b" style:font-style-asian="italic" style:font-style-complex="italic"/>
    </style:style>
    <style:style style:name="P13" style:family="paragraph" style:parent-style-name="Text_20_body">
      <style:text-properties fo:font-style="italic" officeooo:rsid="000a3725" officeooo:paragraph-rsid="000a3725" style:font-style-asian="italic" style:font-style-complex="italic"/>
    </style:style>
    <style:style style:name="P14" style:family="paragraph" style:parent-style-name="Text_20_body">
      <style:text-properties fo:font-style="italic" officeooo:rsid="000c0b32" officeooo:paragraph-rsid="000c0b32" style:font-style-asian="italic" style:font-style-complex="italic"/>
    </style:style>
    <style:style style:name="P15" style:family="paragraph" style:parent-style-name="Text_20_body">
      <style:text-properties officeooo:paragraph-rsid="000c0b32"/>
    </style:style>
    <style:style style:name="P16" style:family="paragraph" style:parent-style-name="Table_20_Contents">
      <style:paragraph-properties fo:text-align="center" style:justify-single-word="false"/>
      <style:text-properties style:font-name="Liberation Serif" officeooo:rsid="000d5a7f" officeooo:paragraph-rsid="000d5a7f" style:font-name-asian="Liberation Serif" style:font-name-complex="Liberation Serif"/>
    </style:style>
    <style:style style:name="P17" style:family="paragraph" style:parent-style-name="Table_20_Contents">
      <style:paragraph-properties fo:text-align="center" style:justify-single-word="false"/>
      <style:text-properties style:font-name="Liberation Serif" fo:font-style="italic" officeooo:rsid="000d5a7f" officeooo:paragraph-rsid="000d5a7f" style:font-name-asian="Liberation Serif" style:font-style-asian="italic" style:font-name-complex="Liberation Serif" style:font-style-complex="italic"/>
    </style:style>
    <style:style style:name="P18" style:family="paragraph" style:parent-style-name="Text_20_body" style:list-style-name="L1">
      <style:text-properties officeooo:rsid="0009208b" officeooo:paragraph-rsid="0009208b"/>
    </style:style>
    <style:style style:name="P19" style:family="paragraph" style:parent-style-name="Text_20_body" style:list-style-name="L2">
      <style:text-properties officeooo:rsid="0009208b" officeooo:paragraph-rsid="0009208b"/>
    </style:style>
    <style:style style:name="P20" style:family="paragraph" style:parent-style-name="Text_20_body" style:list-style-name="L3">
      <style:text-properties officeooo:rsid="0009208b" officeooo:paragraph-rsid="0009208b"/>
    </style:style>
    <style:style style:name="P21" style:family="paragraph" style:parent-style-name="Text_20_body">
      <style:text-properties officeooo:rsid="0009208b" officeooo:paragraph-rsid="0009208b"/>
    </style:style>
    <style:style style:name="P22" style:family="paragraph" style:parent-style-name="Text_20_body">
      <style:paragraph-properties fo:break-before="page"/>
      <style:text-properties officeooo:rsid="0009208b" officeooo:paragraph-rsid="0009208b"/>
    </style:style>
    <style:style style:name="P23" style:family="paragraph" style:parent-style-name="Text_20_body" style:list-style-name="L4">
      <style:text-properties fo:font-style="normal" officeooo:rsid="000a3725" officeooo:paragraph-rsid="000a3725" style:font-style-asian="normal" style:font-style-complex="normal"/>
    </style:style>
    <style:style style:name="P24" style:family="paragraph" style:parent-style-name="Text_20_body">
      <style:text-properties fo:font-style="normal" officeooo:rsid="000a3725" officeooo:paragraph-rsid="000a3725" style:font-style-asian="normal" style:font-style-complex="normal"/>
    </style:style>
    <style:style style:name="P25" style:family="paragraph" style:parent-style-name="Text_20_body">
      <style:paragraph-properties fo:break-before="page"/>
      <style:text-properties fo:font-style="normal" officeooo:rsid="000a3725" officeooo:paragraph-rsid="000a3725" style:font-style-asian="normal" style:font-style-complex="normal"/>
    </style:style>
    <style:style style:name="P26" style:family="paragraph" style:parent-style-name="Text_20_body" style:list-style-name="L7">
      <style:text-properties fo:font-style="normal" officeooo:rsid="000d1fc8" officeooo:paragraph-rsid="000d1fc8" style:font-style-asian="normal" style:font-style-complex="normal"/>
    </style:style>
    <style:style style:name="P27" style:family="paragraph" style:parent-style-name="Text_20_body" style:list-style-name="L7">
      <style:paragraph-properties fo:margin-top="0.201cm" fo:margin-bottom="0.448cm" style:contextual-spacing="false"/>
      <style:text-properties fo:font-style="normal" officeooo:rsid="000d1fc8" officeooo:paragraph-rsid="000d1fc8" style:font-style-asian="normal" style:font-style-complex="normal"/>
    </style:style>
    <style:style style:name="P28" style:family="paragraph" style:parent-style-name="Text_20_body">
      <style:text-properties fo:font-style="normal" officeooo:rsid="000d1fc8" officeooo:paragraph-rsid="000d1fc8" style:font-style-asian="normal" style:font-style-complex="normal"/>
    </style:style>
    <style:style style:name="P29" style:family="paragraph" style:parent-style-name="Text_20_body">
      <style:paragraph-properties fo:break-before="page"/>
      <style:text-properties fo:font-style="normal" officeooo:rsid="000d1fc8" officeooo:paragraph-rsid="000d1fc8" style:font-style-asian="normal" style:font-style-complex="normal"/>
    </style:style>
    <style:style style:name="P30" style:family="paragraph" style:parent-style-name="Text_20_body">
      <style:text-properties fo:font-style="normal" officeooo:rsid="000c0b32" officeooo:paragraph-rsid="000d5a7f" style:font-style-asian="normal" style:font-style-complex="normal"/>
    </style:style>
    <style:style style:name="P31" style:family="paragraph" style:parent-style-name="Text_20_body">
      <style:text-properties fo:font-style="normal" officeooo:rsid="000c0b32" officeooo:paragraph-rsid="000c0b32" style:font-style-asian="normal" style:font-style-complex="normal"/>
    </style:style>
    <style:style style:name="P32" style:family="paragraph" style:parent-style-name="Text_20_body">
      <style:paragraph-properties fo:break-before="page"/>
      <style:text-properties fo:font-style="normal" officeooo:rsid="000c0b32" officeooo:paragraph-rsid="000c0b32" style:font-style-asian="normal" style:font-style-complex="normal"/>
    </style:style>
    <style:style style:name="P33" style:family="paragraph" style:parent-style-name="Text_20_body">
      <style:text-properties fo:font-style="normal" officeooo:rsid="000c0b32" officeooo:paragraph-rsid="000d5de8" style:font-style-asian="normal" style:font-style-complex="normal"/>
    </style:style>
    <style:style style:name="P34" style:family="paragraph" style:parent-style-name="Text_20_body">
      <style:paragraph-properties fo:margin-top="0cm" fo:margin-bottom="0cm" style:contextual-spacing="false"/>
      <style:text-properties fo:font-style="normal" officeooo:rsid="000c0b32" officeooo:paragraph-rsid="000d5de8" style:font-style-asian="normal" style:font-style-complex="normal"/>
    </style:style>
    <style:style style:name="P35" style:family="paragraph" style:parent-style-name="Text_20_body">
      <style:text-properties fo:font-style="normal" officeooo:rsid="000d5de8" officeooo:paragraph-rsid="000d5de8" style:font-style-asian="normal" style:font-style-complex="normal"/>
    </style:style>
    <style:style style:name="P36" style:family="paragraph" style:parent-style-name="Text_20_body" style:list-style-name="L5">
      <style:text-properties officeooo:paragraph-rsid="000c0b32"/>
    </style:style>
    <style:style style:name="P37" style:family="paragraph" style:parent-style-name="Text_20_body" style:list-style-name="L5">
      <style:text-properties fo:font-style="italic" officeooo:rsid="000c0b32" officeooo:paragraph-rsid="000c0b32" style:font-style-asian="italic" style:font-style-complex="italic"/>
    </style:style>
    <style:style style:name="P38" style:family="paragraph" style:parent-style-name="Text_20_body" style:list-style-name="L6">
      <style:text-properties fo:font-style="italic" officeooo:rsid="000c0b32" officeooo:paragraph-rsid="000d5de8" style:font-style-asian="italic" style:font-style-complex="italic"/>
    </style:style>
    <style:style style:name="P39" style:family="paragraph" style:parent-style-name="Text_20_body" style:list-style-name="L6">
      <style:paragraph-properties fo:margin-top="0cm" fo:margin-bottom="0cm" style:contextual-spacing="false"/>
      <style:text-properties fo:font-style="italic" officeooo:rsid="000c0b32" officeooo:paragraph-rsid="000d5de8" style:font-style-asian="italic" style:font-style-complex="italic"/>
    </style:style>
    <style:style style:name="P40" style:family="paragraph" style:parent-style-name="Text_20_body" style:list-style-name="L5">
      <style:text-properties fo:font-style="italic" officeooo:rsid="000d5a7f" officeooo:paragraph-rsid="000d5a7f" style:font-style-asian="italic" style:font-style-complex="italic"/>
    </style:style>
    <style:style style:name="P41" style:family="paragraph" style:parent-style-name="Text_20_body" style:list-style-name="L7">
      <style:text-properties officeooo:paragraph-rsid="000d5a7f"/>
    </style:style>
    <style:style style:name="P42" style:family="paragraph" style:parent-style-name="Text_20_body" style:list-style-name="L7">
      <style:text-properties style:font-name="Liberation Serif" fo:font-style="normal" officeooo:rsid="000d1fc8" officeooo:paragraph-rsid="000d1fc8" style:font-name-asian="Liberation Serif" style:font-style-asian="normal" style:font-name-complex="Liberation Serif" style:font-style-complex="normal"/>
    </style:style>
    <style:style style:name="P43" style:family="paragraph" style:parent-style-name="Text_20_body" style:list-style-name="L7">
      <style:text-properties style:font-name="Liberation Serif" fo:font-style="normal" officeooo:rsid="000d1fc8" officeooo:paragraph-rsid="000d5a7f" style:font-name-asian="Liberation Serif" style:font-style-asian="normal" style:font-name-complex="Liberation Serif" style:font-style-complex="normal"/>
    </style:style>
    <style:style style:name="P44" style:family="paragraph" style:parent-style-name="Text_20_body" style:list-style-name="L7">
      <style:text-properties style:font-name="Liberation Serif" fo:font-style="normal" officeooo:rsid="000d1fc8" officeooo:paragraph-rsid="000d5de8" style:font-name-asian="Liberation Serif" style:font-style-asian="normal" style:font-name-complex="Liberation Serif" style:font-style-complex="normal"/>
    </style:style>
    <style:style style:name="P45" style:family="paragraph" style:parent-style-name="Text_20_body" style:list-style-name="L7">
      <style:paragraph-properties fo:margin-top="0cm" fo:margin-bottom="0cm" style:contextual-spacing="false"/>
      <style:text-properties style:font-name="Liberation Serif" fo:font-style="normal" officeooo:rsid="000d1fc8" officeooo:paragraph-rsid="000d5de8" style:font-name-asian="Liberation Serif" style:font-style-asian="normal" style:font-name-complex="Liberation Serif" style:font-style-complex="normal"/>
    </style:style>
    <style:style style:name="P46" style:family="paragraph" style:parent-style-name="Text_20_body" style:list-style-name="L7">
      <style:text-properties style:font-name="Liberation Serif" fo:font-style="normal" officeooo:rsid="000d5a7f" officeooo:paragraph-rsid="000d5a7f" style:font-name-asian="Liberation Serif" style:font-style-asian="normal" style:font-name-complex="Liberation Serif" style:font-style-complex="normal"/>
    </style:style>
    <style:style style:name="P47" style:family="paragraph" style:parent-style-name="Text_20_body" style:list-style-name="L7">
      <style:paragraph-properties fo:margin-top="0.199cm" fo:margin-bottom="0.25cm" style:contextual-spacing="false"/>
      <style:text-properties style:font-name="Liberation Serif" fo:font-style="normal" officeooo:rsid="000d5a7f" officeooo:paragraph-rsid="000d5a7f" style:font-name-asian="Liberation Serif" style:font-style-asian="normal" style:font-name-complex="Liberation Serif" style:font-style-complex="normal"/>
    </style:style>
    <style:style style:name="P48" style:family="paragraph" style:parent-style-name="Text_20_body" style:list-style-name="L7">
      <style:paragraph-properties fo:margin-top="0cm" fo:margin-bottom="0.45cm" style:contextual-spacing="false"/>
      <style:text-properties style:font-name="Liberation Serif" fo:font-style="normal" officeooo:rsid="000d5a7f" officeooo:paragraph-rsid="000d5a7f" style:font-name-asian="Liberation Serif" style:font-style-asian="normal" style:font-name-complex="Liberation Serif" style:font-style-complex="normal"/>
    </style:style>
    <style:style style:name="P49" style:family="paragraph" style:parent-style-name="Text_20_body" style:list-style-name="L7">
      <style:text-properties style:font-name="Liberation Serif" fo:font-style="normal" officeooo:rsid="000d5a7f" officeooo:paragraph-rsid="000d5de8" style:font-name-asian="Liberation Serif" style:font-style-asian="normal" style:font-name-complex="Liberation Serif" style:font-style-complex="normal"/>
    </style:style>
    <style:style style:name="P50" style:family="paragraph" style:parent-style-name="Text_20_body" style:list-style-name="L7">
      <style:paragraph-properties fo:margin-top="0cm" fo:margin-bottom="0cm" style:contextual-spacing="false"/>
      <style:text-properties style:font-name="Liberation Serif" fo:font-style="normal" officeooo:rsid="000d5a7f" officeooo:paragraph-rsid="000d5de8" style:font-name-asian="Liberation Serif" style:font-style-asian="normal" style:font-name-complex="Liberation Serif" style:font-style-complex="normal"/>
    </style:style>
    <style:style style:name="P51" style:family="paragraph" style:parent-style-name="Text_20_body">
      <style:text-properties style:font-name="Liberation Serif" fo:font-style="normal" officeooo:rsid="000d5a7f" officeooo:paragraph-rsid="000d5a7f" style:font-name-asian="Liberation Serif" style:font-style-asian="normal" style:font-name-complex="Liberation Serif" style:font-style-complex="normal"/>
    </style:style>
    <style:style style:name="P52" style:family="paragraph" style:parent-style-name="Text_20_body" style:list-style-name="L9">
      <style:text-properties style:font-name="Liberation Serif" fo:font-style="normal" officeooo:rsid="000d5a7f" officeooo:paragraph-rsid="000d5a7f" style:font-name-asian="Liberation Serif" style:font-style-asian="normal" style:font-name-complex="Liberation Serif" style:font-style-complex="normal"/>
    </style:style>
    <style:style style:name="P53" style:family="paragraph" style:parent-style-name="Text_20_body" style:list-style-name="L10">
      <style:text-properties style:font-name="Liberation Serif" fo:font-style="normal" officeooo:rsid="000d5a7f" officeooo:paragraph-rsid="000d5a7f" style:font-name-asian="Liberation Serif" style:font-style-asian="normal" style:font-name-complex="Liberation Serif" style:font-style-complex="normal"/>
    </style:style>
    <style:style style:name="P54" style:family="paragraph" style:parent-style-name="Text_20_body" style:list-style-name="L10">
      <style:paragraph-properties fo:margin-top="0cm" fo:margin-bottom="0.45cm" style:contextual-spacing="false"/>
      <style:text-properties style:font-name="Liberation Serif" fo:font-style="normal" officeooo:rsid="000d5a7f" officeooo:paragraph-rsid="000d5a7f" style:font-name-asian="Liberation Serif" style:font-style-asian="normal" style:font-name-complex="Liberation Serif" style:font-style-complex="normal"/>
    </style:style>
    <style:style style:name="P55" style:family="paragraph" style:parent-style-name="Text_20_body">
      <style:text-properties style:font-name="Liberation Serif" fo:font-style="normal" officeooo:rsid="000d5a7f" officeooo:paragraph-rsid="000d5de8" style:font-name-asian="Liberation Serif" style:font-style-asian="normal" style:font-name-complex="Liberation Serif" style:font-style-complex="normal"/>
    </style:style>
    <style:style style:name="P56" style:family="paragraph" style:parent-style-name="Text_20_body">
      <style:text-properties style:font-name="Liberation Serif" fo:font-style="normal" officeooo:rsid="000d5de8" officeooo:paragraph-rsid="000d5de8" style:font-name-asian="Liberation Serif" style:font-style-asian="normal" style:font-name-complex="Liberation Serif" style:font-style-complex="normal"/>
    </style:style>
    <style:style style:name="P57" style:family="paragraph" style:parent-style-name="Text_20_body" style:list-style-name="L8">
      <style:text-properties officeooo:paragraph-rsid="000d5a7f"/>
    </style:style>
    <style:style style:name="P58" style:family="paragraph" style:parent-style-name="Text_20_body" style:list-style-name="L11">
      <style:text-properties officeooo:paragraph-rsid="000d5de8"/>
    </style:style>
    <style:style style:name="P59" style:family="paragraph" style:parent-style-name="Text_20_body" style:list-style-name="L11">
      <style:text-properties officeooo:rsid="000d5de8" officeooo:paragraph-rsid="000d5de8"/>
    </style:style>
    <style:style style:name="T1" style:family="text">
      <style:text-properties officeooo:rsid="0009208b"/>
    </style:style>
    <style:style style:name="T2" style:family="text">
      <style:text-properties style:text-position="0% 100%"/>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officeooo:rsid="000a3725" style:font-style-asian="italic" style:font-style-complex="italic"/>
    </style:style>
    <style:style style:name="T6" style:family="text">
      <style:text-properties fo:font-style="italic" officeooo:rsid="000a38d0" style:font-style-asian="italic" style:font-style-complex="italic"/>
    </style:style>
    <style:style style:name="T7" style:family="text">
      <style:text-properties fo:font-style="italic" officeooo:rsid="000c0b32" style:font-style-asian="italic" style:font-style-complex="italic"/>
    </style:style>
    <style:style style:name="T8" style:family="text">
      <style:text-properties fo:font-style="italic" officeooo:rsid="000d1fc8" style:font-style-asian="italic" style:font-style-complex="italic"/>
    </style:style>
    <style:style style:name="T9" style:family="text">
      <style:text-properties fo:font-style="italic" officeooo:rsid="000d5a7f" style:font-style-asian="italic" style:font-style-complex="italic"/>
    </style:style>
    <style:style style:name="T10" style:family="text">
      <style:text-properties fo:font-style="italic" officeooo:rsid="000d5de8"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a3725" style:font-style-asian="normal" style:font-style-complex="normal"/>
    </style:style>
    <style:style style:name="T13" style:family="text">
      <style:text-properties fo:font-style="normal" officeooo:rsid="000c0b32" style:font-style-asian="normal" style:font-style-complex="normal"/>
    </style:style>
    <style:style style:name="T14" style:family="text">
      <style:text-properties fo:font-style="normal" officeooo:rsid="000d5a7f" style:font-style-asian="normal" style:font-style-complex="normal"/>
    </style:style>
    <style:style style:name="T15" style:family="text">
      <style:text-properties fo:font-style="normal" officeooo:rsid="000d5de8" style:font-style-asian="normal" style:font-style-complex="normal"/>
    </style:style>
    <style:style style:name="T16" style:family="text">
      <style:text-properties officeooo:rsid="000a3725"/>
    </style:style>
    <style:style style:name="T17" style:family="text">
      <style:text-properties officeooo:rsid="000a38d0"/>
    </style:style>
    <style:style style:name="T18" style:family="text">
      <style:text-properties officeooo:rsid="000c0b32"/>
    </style:style>
    <style:style style:name="T19" style:family="text">
      <style:text-properties officeooo:rsid="000d1fc8"/>
    </style:style>
    <style:style style:name="T20" style:family="text">
      <style:text-properties style:font-name="Liberation Serif" style:font-name-asian="Liberation Serif" style:font-name-complex="Liberation Serif"/>
    </style:style>
    <style:style style:name="T21" style:family="text">
      <style:text-properties style:font-name="Liberation Serif" officeooo:rsid="00147f69" style:font-name-asian="Liberation Serif" style:font-name-complex="Liberation Serif"/>
    </style:style>
    <style:style style:name="T22" style:family="text">
      <style:text-properties style:font-name="Liberation Serif" fo:font-style="normal" officeooo:rsid="000d5a7f" style:font-name-asian="Liberation Serif" style:font-style-asian="normal" style:font-name-complex="Liberation Serif" style:font-style-complex="normal"/>
    </style:style>
    <style:style style:name="T23" style:family="text">
      <style:text-properties style:font-name="Liberation Serif" fo:font-style="normal" officeooo:rsid="000d1fc8" style:font-name-asian="Liberation Serif" style:font-style-asian="normal" style:font-name-complex="Liberation Serif" style:font-style-complex="normal"/>
    </style:style>
    <style:style style:name="T24" style:family="text">
      <style:text-properties style:font-name="Liberation Serif" fo:font-style="normal" officeooo:rsid="000d5de8" style:font-name-asian="Liberation Serif" style:font-style-asian="normal" style:font-name-complex="Liberation Serif" style:font-style-complex="normal"/>
    </style:style>
    <style:style style:name="T25" style:family="text">
      <style:text-properties style:font-name="Liberation Serif" fo:font-weight="bold" style:font-name-asian="Liberation Serif" style:font-weight-asian="bold" style:font-name-complex="Liberation Serif" style:font-weight-complex="bold"/>
    </style:style>
    <style:style style:name="T26" style:family="text">
      <style:text-properties style:font-name="Liberation Serif" style:text-underline-style="none" fo:font-weight="bold" style:font-name-asian="Liberation Serif" style:font-weight-asian="bold" style:font-name-complex="Liberation Serif" style:font-weight-complex="bold"/>
    </style:style>
    <style:style style:name="T27" style:family="text">
      <style:text-properties officeooo:rsid="000d5a7f"/>
    </style:style>
    <style:style style:name="T28" style:family="text">
      <style:text-properties fo:font-weight="bold" style:font-weight-asian="bold" style:font-weight-complex="bold"/>
    </style:style>
    <style:style style:name="T29" style:family="text">
      <style:text-properties officeooo:rsid="000d5d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vire SCHOTT GUILMAULT</text:p>
      <text:p text:style-name="P3">Formation FPGA</text:p>
      <text:p text:style-name="P3">TP<text:span text:style-name="T1">2</text:span> – <text:span text:style-name="T1">Compteurs</text:span></text:p>
      <text:p text:style-name="P2"/>
      <text:p text:style-name="Text_20_body">1) Calcul du nombre de périodes d’horloge pour atteindre 2 secondes</text:p>
      <text:p text:style-name="P4"/>
      <text:p text:style-name="P4">L’horloge système a une fréquence <draw:frame draw:style-name="fr10" draw:name="Objet2" text:anchor-type="as-char" svg:y="-0.377cm" svg:width="2.422cm" svg:height="0.533cm" draw:z-index="11"><draw:object xlink:href="./Object 2" xlink:type="simple" xlink:show="embed" xlink:actuate="onLoad"/><draw:image xlink:href="./ObjectReplacements/Object 2" xlink:type="simple" xlink:show="embed" xlink:actuate="onLoad"/></draw:frame><text:span text:style-name="T2">, ce qui correspond à une période </text:span><text:span text:style-name="T2"><draw:frame draw:style-name="fr10" draw:name="Objet1" text:anchor-type="as-char" svg:y="-0.621cm" svg:width="4.755cm" svg:height="1.064cm" draw:z-index="0"><draw:object xlink:href="./Object 1" xlink:type="simple" xlink:show="embed" xlink:actuate="onLoad"/><draw:image xlink:href="./ObjectReplacements/Object 1" xlink:type="simple" xlink:show="embed" xlink:actuate="onLoad"/></draw:frame></text:span><text:span text:style-name="T2">.</text:span></text:p>
      <text:p text:style-name="P4">Le nombre de périodes pour atteindre 2 secondes se calcule donc avec</text:p>
      <text:p text:style-name="P4"><draw:frame draw:style-name="fr10" draw:name="Objet3" text:anchor-type="as-char" svg:y="-0.621cm" svg:width="5.054cm" svg:height="1.064cm" draw:z-index="1"><draw:object xlink:href="./Object 3" xlink:type="simple" xlink:show="embed" xlink:actuate="onLoad"/><draw:image xlink:href="./ObjectReplacements/Object 3" xlink:type="simple" xlink:show="embed" xlink:actuate="onLoad"/></draw:frame>.</text:p>
      <text:p text:style-name="P4">Pour calculer le nombre de bits nécessaire<text:span text:style-name="T29">s</text:span> à l’encodage d’un compteur de période allant jusqu’à cette valeur N, on utilise un logarithme en base 2 <draw:frame draw:style-name="fr10" draw:name="Objet4" text:anchor-type="as-char" svg:y="-0.386cm" svg:width="2.902cm" svg:height="0.542cm" draw:z-index="2"><draw:object xlink:href="./Object 4" xlink:type="simple" xlink:show="embed" xlink:actuate="onLoad"/><draw:image xlink:href="./ObjectReplacements/Object 4" xlink:type="simple" xlink:show="embed" xlink:actuate="onLoad"/></draw:frame>.</text:p>
      <text:p text:style-name="P4">En arrondissant cette valeur à l’entier supérieur, on trouve donc qu’il nous faut <text:span text:style-name="T3">28 bits</text:span> pour encoder notre compteur (les 2 secondes sont atteintes quand le compteur atteint la valeur binaire ‘1011111010111100001000000000’, soit une valeur hexadécimale ‘BEBC200’).</text:p>
      <text:p text:style-name="P5"/>
      <text:p text:style-name="P4">2) Schéma RTL du compteur « simple »</text:p>
      <text:p text:style-name="P4">Il est constitué d’un incrémenteur (28 bits), d’un registre (28 bits) <text:span text:style-name="T16">sans reset</text:span> et d’un comparateur (28 bits).</text:p>
      <text:p text:style-name="P4">À chaque période d’horloge, la sortie du registre est incrémentée et réenregistrée. La sortie du registre est comparée à la valeur cible ‘BEBC200’ qui correspond à 2 s d’incrémentations, et qui déclenche le signal <text:span text:style-name="T4">end_counter</text:span><text:span text:style-name="T11">.</text:span></text:p>
      <text:p text:style-name="P4"><draw:frame draw:style-name="fr3" draw:name="Image1" text:anchor-type="char" svg:width="17cm" svg:height="4.57cm" draw:z-index="3"><draw:image xlink:href="Pictures/1000000100000384000000F2BEB464E29DA18C74.png" xlink:type="simple" xlink:show="embed" xlink:actuate="onLoad" draw:mime-type="image/png"/></draw:frame></text:p>
      <text:p text:style-name="P4"/>
      <text:p text:style-name="P22">3) Schéma RTL du compteur avec reset <text:span text:style-name="T16">interne</text:span></text:p>
      <text:p text:style-name="P4">Il est identique au précédent, mais cette fois le signal en sortie de la comparaison est également utilisé pour déclencher <text:span text:style-name="T16">un</text:span> reset du compteur (sur son état haut ‘1’).</text:p>
      <text:p text:style-name="P4">La comparaison peut être simplifiée en un simple ‘=’ puisque dans cette configuration le compteur ne dépassera plus la valeur ciblée.</text:p>
      <text:p text:style-name="P4"><draw:frame draw:style-name="fr3" draw:name="Image2" text:anchor-type="char" svg:width="17cm" svg:height="5.221cm" draw:z-index="4"><draw:image xlink:href="Pictures/10000001000003AD00000121A9BF53DA30D47783.png" xlink:type="simple" xlink:show="embed" xlink:actuate="onLoad" draw:mime-type="image/png"/></draw:frame></text:p>
      <text:p text:style-name="P4">4) Signaux d’entrée, de sortie et internes</text:p>
      <text:p text:style-name="P4">Entrée :</text:p>
      <text:list text:style-name="L1">
        <text:list-item>
          <text:p text:style-name="P18">Le signal d’horloge <text:span text:style-name="T16">c</text:span><text:span text:style-name="T4">lk</text:span><text:span text:style-name="T11"> (1 bit)</text:span></text:p>
        </text:list-item>
      </text:list>
      <text:p text:style-name="P6">Sortie :</text:p>
      <text:list text:style-name="L2">
        <text:list-item>
          <text:p text:style-name="P19"><text:span text:style-name="T11">Le signal </text:span><text:span text:style-name="T4">end_counter</text:span><text:span text:style-name="T11"> (1 bit)</text:span></text:p>
        </text:list-item>
      </text:list>
      <text:p text:style-name="P6">Internes :</text:p>
      <text:list text:style-name="L3">
        <text:list-item>
          <text:p text:style-name="P20"><text:span text:style-name="T11">Le signal intermédiaire </text:span><text:span text:style-name="T4">Data </text:span><text:span text:style-name="T11">à la sortie du registre (28 bits)</text:span></text:p>
        </text:list-item>
        <text:list-item>
          <text:p text:style-name="P20"><text:span text:style-name="T11">Le signal intermédiaire </text:span><text:span text:style-name="T4">reset</text:span><text:span text:style-name="T5">_cible</text:span><text:span text:style-name="T11"> </text:span><text:span text:style-name="T12">à</text:span><text:span text:style-name="T11"> la sortie du comparateur (1 bit), identique au signal de sortie </text:span><text:span text:style-name="T4">end_counter</text:span></text:p>
        </text:list-item>
      </text:list>
      <text:p text:style-name="P12"/>
      <text:p text:style-name="P7">5) <text:span text:style-name="T18">Écriture du compteur en VHDL : v</text:span>oir fichier <text:span text:style-name="T4">counter.vhd.</text:span></text:p>
      <text:p text:style-name="P13"/>
      <text:p text:style-name="P7">6) <text:span text:style-name="T18">Écriture du testbench pour simulation : v</text:span>oir fichier <text:span text:style-name="T4">tb_counter.vhd.</text:span></text:p>
      <text:p text:style-name="P7">Le seul signal externe de notre compteur étant son horloge, il n’y a aucun test particulier à faire sur des modifications de signaux d’entrée.</text:p>
      <text:p text:style-name="P7">Le seul test effectué est de tester que le signal de sortie <text:span text:style-name="T4">end_counter </text:span>vaut bien ‘1’ au moment où on a atteint un cycle de compteur entier, qu’il repasse bien à ‘0’ au cycle suivant, et finalement qu’il reprends la valeur ‘1’ au bout de 2 cycles.</text:p>
      <text:p text:style-name="P7"/>
      <text:p text:style-name="P7"/>
      <text:p text:style-name="P25">7) Simulation du compteur</text:p>
      <text:p text:style-name="P7">Pour accélérer le calcul de la simulation, j’ai modifié le fichier <text:span text:style-name="T4">counter.vhd</text:span> le temps de celle-ci, pour définir la constante <text:span text:style-name="T4">cible</text:span> à 200000, soit un cycle de compteur de 2 ms.</text:p>
      <text:p text:style-name="P7">On lance la simulation sur 5 ms, pour observer 2 cycles entier<text:span text:style-name="T29">s</text:span> du compteur.</text:p>
      <text:p text:style-name="P7">Sur le chronogramme, on doit observer le signal <text:span text:style-name="T4">end_counter</text:span> faire un pic d’une période d’horloge à la fin du cycle de compteur, soit au bout de 2 ms, et un autre à 4 ms.</text:p>
      <text:p text:style-name="P7">Le registre 28 bits <text:span text:style-name="T4">Data</text:span> doit se remplir en cascade au cour du cycle, le bit 0 oscillant tous les fronts montants de l’horloge, donc avec une période totale double de celle de l’horloge, les bits suivants voyant de même chacun leur période multipliée par deux par rapport au précédent.</text:p>
      <text:p text:style-name="P7">La valeur de la durée totale du cycle ayant été divisée par 1000 pour la simulation, plusieurs des bits supérieurs ne seront jamais utilisés.</text:p>
      <text:p text:style-name="P7">À la fin du cycle, quand on observe le pic de <text:span text:style-name="T4">end_counter</text:span>, tous les bits de <text:span text:style-name="T4">Data</text:span> doivent être réinitialisés à 0.</text:p>
      <text:p text:style-name="P7"/>
      <text:p text:style-name="P7">Voici le chronogramme obtenu pour l’ensemble des 5 ms de simulations</text:p>
      <text:p text:style-name="P7"><draw:frame draw:style-name="fr2" draw:name="Image5" text:anchor-type="char" svg:x="0cm" svg:y="0.131cm" svg:width="17cm" svg:height="8.333cm" draw:z-index="6"><draw:image xlink:href="Pictures/100000000000069300000339390746CD4B368342.png" xlink:type="simple" xlink:show="embed" xlink:actuate="onLoad" draw:mime-type="image/png"/></draw:frame></text:p>
      <text:p text:style-name="P7">On observe bien les pics de <text:span text:style-name="T4">end_counter</text:span> à 2 ms et 4 ms, et le reset de <text:span text:style-name="T4">Data</text:span> à ces deux instants. <text:span text:style-name="T4">Data</text:span> se remplit bien en cascade pendant le cycle, et les bits 19 à 27 ne sont pas utilisés, comme on s’y attendait.</text:p>
      <text:p text:style-name="P7"/>
      <text:p text:style-name="P7">Voici un zoom du chronogramme à 2 ms, au moment du premier pic de <text:span text:style-name="T4">end_counter </text:span>:</text:p>
      <text:p text:style-name="P7"/>
      <text:p text:style-name="P7"><draw:frame draw:style-name="fr9" draw:name="Image4" text:anchor-type="char" svg:width="17cm" svg:height="8.454cm" draw:z-index="5"><draw:image xlink:href="Pictures/100000000000068B000003418E7F1BF70905A8B2.png" xlink:type="simple" xlink:show="embed" xlink:actuate="onLoad" draw:mime-type="image/png"/></draw:frame><text:soft-page-break/></text:p>
      <text:p text:style-name="P7">On observe que le pic de <text:span text:style-name="T4">end_counter</text:span> commence 5 ns avant les 2 ms. C’est parce que l’horloge est initialisée à ‘0’ à t=0, que son premier front montant à lieu après une demi-période à t=5 ns, et donc que la première incrémentation de <text:span text:style-name="T4">Data</text:span> à lieu à ce même instant, et <text:span text:style-name="T4">Data</text:span> prends la valeur 1. Entre t=5 ns et t=1 999 995 ns, 199 999 cycle d’horloge supplémentaires ont eu lieu, <text:span text:style-name="T4">Data</text:span> s’est donc incrémenté 19<text:span text:style-name="T29">9 </text:span>999 fois supplémentaires, et vaut la valeur cible 200 000. Le signal <text:span text:style-name="T4">end_counter</text:span> prends donc l’état ‘1’.</text:p>
      <text:p text:style-name="P7">Dans le fichier <text:span text:style-name="T4">counter.vhd</text:span>, le process (ie la partie séquentielle) est calé sur les changements d’états du signal d’horloge <text:span text:style-name="T4">clk</text:span>, il vérifie donc la condition de reset au front d’horloge suivant, le front bas à t=2 ms. C’est à ce moment que le reset à lieu, que<text:span text:style-name="T4"> Data</text:span> est réinitialisé à 0 et que le signal<text:span text:style-name="T4"> end_counter</text:span> repasse à l’état ‘0’. L’incrémentation reprend au front haut de l’horloge suivant, à t=2 000 005 ns.</text:p>
      <text:p text:style-name="P7"/>
      <text:p text:style-name="P7">Ces résultats nous semblent satisfaisants, les tests intégrés au testbench <text:span text:style-name="T4">tb_counter.vhd</text:span> sont validés :</text:p>
      <text:p text:style-name="P7"><draw:frame draw:style-name="fr8" draw:name="Image6" text:anchor-type="char" svg:x="2.143cm" svg:y="-0.083cm" svg:width="10.53cm" svg:height="3.731cm" draw:z-index="7"><draw:image xlink:href="Pictures/100000000000018E0000008D619C589E4DF46624.png" xlink:type="simple" xlink:show="embed" xlink:actuate="onLoad" draw:mime-type="image/png"/></draw:frame></text:p>
      <text:p text:style-name="P7">8) Ajout d’une sortie LED.</text:p>
      <text:p text:style-name="P7">On ajoute la sortie <text:span text:style-name="T4">led</text:span> (1 bit) au fichier source <text:span text:style-name="T4">counter.vhd</text:span>. Pour l’instant, elle possède la même valeur que la sortie end_<text:span text:style-name="T4">counter, </text:span>et comme <text:span text:style-name="T29">celle-ci</text:span> sera haute pendant un seul coup d’horloge en fin de cycle.</text:p>
      <text:p text:style-name="P7"><text:soft-page-break/>On modifie le fichier de contraintes <text:span text:style-name="T4">Cora-Z7-10-Master.xdc </text:span>en conséquence pour relier cette sortie à la broche de la LED bleue 1.</text:p>
      <text:p text:style-name="P7"/>
      <text:p text:style-name="P7">9) On ajoute un signal de reset externe <text:span text:style-name="T4">restart</text:span> (1 bit), et on doit gérer la bascule de la LED entre son état allumé et éteint quand le compteur atteint sa cible.</text:p>
      <text:p text:style-name="P7"/>
      <text:p text:style-name="P7"><text:span text:style-name="T17">Pour la gestion du reset, on a à la fois le nouveau signal externe </text:span><text:span text:style-name="T6">restart,</text:span><text:span text:style-name="T17"> dont on voudrait que l’action soit asynchrone, et le signal interne déjà existant </text:span><text:span text:style-name="T6">r_cible</text:span><text:span text:style-name="T17">, pour laquelle l’action doit être synchrone.</text:span></text:p>
      <text:p text:style-name="P8">On va donc réorganiser la logique RTL autour du registre compteur. Son entrée reset sera pilotée de manière asynchrone par le signal <text:span text:style-name="T4">restart</text:span>, la réinitialisation étant déclenchée par son état haut ‘1’. La réinitialisation par le signal <text:span text:style-name="T4">r_cible</text:span> ne sera plus gérée par l’entrée reset, mais au niveau de l’entrée de données D. En amont de celle-ci on va positionner un multiplexeur, commandé par le signal <text:span text:style-name="T4">r_cible </text:span>: lorsque <text:span text:style-name="T4">r_cible</text:span> vaut ‘0’ on garde le fonctionnement normal d’incrémentation de <text:span text:style-name="T4">Data</text:span>, lorsque <text:span text:style-name="T4">r_cible </text:span>vaut ‘1’ on remet les 27 premiers bits de <text:span text:style-name="T4">Data</text:span> à ‘0’ et le dernier à ‘1’ (puisque cette réinitialisation à lieu en synchrone, c’est comme si on avait réinitialisé à 0 puis directement incrémenté de 1 comme dans un fonctionnement normal).</text:p>
      <text:p text:style-name="P7"/>
      <text:p text:style-name="P7">Pour gérer l’état de la LED, on veut détecter le front montant du signal <text:span text:style-name="T4">r_cible</text:span> (ie la fin d’un cycle de compteur) et utiliser cette information pour déclencher la bascule entre l’état allumé et éteint de la LED. Pour cela, on a besoin de deux nouveaux registres, les deux sont actionnés par l’horloge <text:span text:style-name="T4">clk</text:span> et soumis au signal de reset externe <text:span text:style-name="T4">restart</text:span>.</text:p>
      <text:p text:style-name="P7">Le premier registre garde en mémoire la dernière valeur du signal <text:span text:style-name="T4">r_cible, </text:span>et le stock sur un signal interne <text:span text:style-name="T4">old_r_cible.</text:span> Pour détecter le front montant du signal <text:span text:style-name="T4">r_cible</text:span>, on compare les valeurs des deux signaux : au front montant on a <text:span text:style-name="T4">old_r_cible</text:span> = 0 et <text:span text:style-name="T4">r_cible</text:span> = 1, donc <text:span text:style-name="T4">old_r_cible </text:span>&lt; <text:span text:style-name="T4">r_cible. </text:span></text:p>
      <text:p text:style-name="P7">Le deuxième registre garde en mémoire la valeur de <text:span text:style-name="T4">led_in. </text:span>On utilise un multiplexeur commandé par le signal issu de la comparaison précédente pour mettre à jour la valeur du registre :</text:p>
      <text:list text:style-name="L4">
        <text:list-item>
          <text:p text:style-name="P23">Lorsque la comparaison est fausse (le signal <text:span text:style-name="T29">de commande </text:span>vaut ‘0’), on n’est pas sur un front haut et donc la valeur <text:span text:style-name="T4">led_in</text:span> reste inchangé.</text:p>
        </text:list-item>
        <text:list-item>
          <text:p text:style-name="P23">Lorsque la comparaison est vrai (le signal <text:span text:style-name="T29">de commande </text:span>vaut ‘1’), on est sur un front haut et on effectue la bascule de <text:span text:style-name="T4">led_in</text:span> qui est remplacée par NOT(<text:span text:style-name="T4">led_in</text:span>).</text:p>
        </text:list-item>
      </text:list>
      <text:p text:style-name="P7">La valeur de <text:span text:style-name="T4">led_in</text:span> est ensuite redirigée vers la sortie <text:span text:style-name="T4">led</text:span>.</text:p>
      <text:p text:style-name="P9"/>
      <text:p text:style-name="P9">Voici le nouveau schéma RTL de notre compteur :</text:p>
      <text:p text:style-name="P7"><draw:frame draw:style-name="fr2" draw:name="Image3" text:anchor-type="char" svg:x="0cm" svg:y="0.026cm" svg:width="17cm" svg:height="15.109cm" draw:z-index="8"><draw:image xlink:href="Pictures/10000001000004880000040773F40533ABE42BC6.png" xlink:type="simple" xlink:show="embed" xlink:actuate="onLoad" draw:mime-type="image/png"/></draw:frame><text:soft-page-break/></text:p>
      <text:p text:style-name="P9">10) Mise à jour du code VHDL pour correspondre au nouveau schéma : Voir <text:span text:style-name="T16">fichier </text:span><text:span text:style-name="T5">counter.vhd.</text:span></text:p>
      <text:p text:style-name="P9">Les lignes ajoutées sont signalées par un commentaire portant la mention « (question 10<text:span text:style-name="T29">+</text:span>) » en fin de ligne, les lignes supprimées par rapport à la version précédentes sont commentées, avec l’indication de la question pour laquelle la ligne était pertinente.</text:p>
      <text:p text:style-name="P9"/>
      <text:p text:style-name="P9">11) Association de l’entrée <text:span text:style-name="T4">restart</text:span> à un bouton : voir <text:span text:style-name="T16">fichier de contraintes </text:span><text:span text:style-name="T5">Cora-Z7-10-Master.xdc</text:span><text:span text:style-name="T16">, </text:span>o<text:span text:style-name="T29">ù</text:span> le signal est relié au bouton 1.</text:p>
      <text:p text:style-name="P35">On profite de l’actualisation des contraintes pour :</text:p>
      <text:list text:style-name="L11">
        <text:list-item>
          <text:p text:style-name="P58"><text:span text:style-name="T15">relier la sortie </text:span><text:span text:style-name="T10">end_counter</text:span><text:span text:style-name="T15"> à la LED 1 verte (et éviter que le signal ne soit lié à rien)</text:span></text:p>
        </text:list-item>
        <text:list-item>
          <text:p text:style-name="P59"><text:span text:style-name="T15">c</text:span><text:span text:style-name="T11">réer le signal d’horloge système carré de période 10 ns et le relier à l’entrée </text:span><text:span text:style-name="T4">clk</text:span></text:p>
        </text:list-item>
      </text:list>
      <text:p text:style-name="P9"/>
      <text:p text:style-name="P9"/>
      <text:p text:style-name="P32">12) Mise à jour du testbench : voir fichier <text:span text:style-name="T5">tb_counter.vhd</text:span><text:span text:style-name="T16">.</text:span></text:p>
      <text:p text:style-name="P9">Les lignes ajoutées sont signalées par un commentaire portant la mention « (question 12<text:span text:style-name="T29">+</text:span>) » en fin de ligne.</text:p>
      <text:p text:style-name="P30">On observe principalement :</text:p>
      <text:list text:style-name="L8">
        <text:list-item>
          <text:p text:style-name="P57"><text:span text:style-name="T14">L</text:span><text:span text:style-name="T13">es deux sorties du design :</text:span></text:p>
        </text:list-item>
      </text:list>
      <text:list text:style-name="L5">
        <text:list-item>
          <text:list>
            <text:list-item>
              <text:p text:style-name="P36"><text:span text:style-name="T7">end_counter</text:span><text:span text:style-name="T13"> doit montrer un pic 2 ms après un reset, que celui ci soit interne lorsque le compteur atteint sa cible, ou externe lorsque le bouton lié a </text:span><text:span text:style-name="T7">restart</text:span><text:span text:style-name="T13"> est appuyé.</text:span></text:p>
            </text:list-item>
            <text:list-item>
              <text:p text:style-name="P37">led<text:span text:style-name="T11"> doit basculer d’état après chaque pic de </text:span>end_counter<text:span text:style-name="T11">, et revenir à ‘0’ lors d’un reset externe provoqué par le bouton </text:span>restart<text:span text:style-name="T11">.</text:span></text:p>
            </text:list-item>
          </text:list>
        </text:list-item>
        <text:list-item>
          <text:p text:style-name="P40"><text:span text:style-name="T11">L’entrée </text:span>restart<text:span text:style-name="T11">, qui permet de vérifier le timing des sorties par rapport à ses changements d’états.</text:span></text:p>
        </text:list-item>
      </text:list>
      <text:p text:style-name="P9"/>
      <text:p text:style-name="P9">En pratique, le scénario de test mis en place dans notre testbench est le suivant (avec une valeur cible pour le compteur toujours raccourcie pour correspondre à un cycle de 2 ms) :</text:p>
      <text:list text:style-name="L6">
        <text:list-item>
          <text:p text:style-name="P39"><text:span text:style-name="T11">7 millisecondes de fonctionnement normal sans action externe.</text:span></text:p>
          <text:p text:style-name="P39"><text:span text:style-name="T11">Toutes les 2 millisecondes, on vérifie que le signal </text:span>end_counter<text:span text:style-name="T11"> est à ‘1’.</text:span></text:p>
          <text:p text:style-name="P38"><text:span text:style-name="T11">Au battement d’horloge suivant (10 ns plus tard), on vérifie que </text:span>end_counter<text:span text:style-name="T11"> est repassé à ‘0’ et que </text:span>led<text:span text:style-name="T11"> a basculé d’état (‘1’ à 2 ms, ‘0’ à 4 ms, ‘1’ à 6 ms).</text:span></text:p>
        </text:list-item>
        <text:list-item>
          <text:p text:style-name="P39"><text:span text:style-name="T11">À t = 7 ms, on appuie sur le bouton </text:span>restart, <text:span text:style-name="T11">pendant 0,5 ms.</text:span></text:p>
          <text:p text:style-name="P39"><text:span text:style-name="T11">On vérifie qu’au premier battement d’horloge après le déclenchement du </text:span>restart<text:span text:style-name="T11">, la </text:span>led<text:span text:style-name="T11"> s’éteint et repasse à l’état ‘0’.</text:span></text:p>
          <text:p text:style-name="P39"><text:span text:style-name="T11">On vérifie ensuite que 2 ms après le relâchement du bouton, le signal </text:span>end_counter <text:span text:style-name="T11">passe à ‘1’.</text:span></text:p>
          <text:p text:style-name="P39"><text:span text:style-name="T11">Au battement d’horloge suivant on vérifie que </text:span>end_counter<text:span text:style-name="T11"> est repassé à ‘0’ et que </text:span>led<text:span text:style-name="T11"> s’allume en passant à l’état ‘1’.</text:span></text:p>
        </text:list-item>
      </text:list>
      <text:p text:style-name="P9"/>
      <text:p text:style-name="P9">Voici le chronogramme obtenu en simulation :</text:p>
      <text:p text:style-name="P14"><draw:frame draw:style-name="fr7" draw:name="Image7" text:anchor-type="char" svg:width="17cm" svg:height="10.668cm" draw:z-index="9"><draw:image xlink:href="Pictures/100000000000065B0000039D37E1F121A44484CE.png" xlink:type="simple" xlink:show="embed" xlink:actuate="onLoad" draw:mime-type="image/png"/></draw:frame><text:soft-page-break/><text:span text:style-name="T11"/></text:p>
      <text:p text:style-name="P9">Visuellement, il correspond bien à ce qui était attendu.</text:p>
      <text:p text:style-name="P9">Les test<text:span text:style-name="T27">s</text:span> réalisés dans le testbench sont validés : </text:p>
      <text:p text:style-name="P9"><draw:frame draw:style-name="fr4" draw:name="Image8" text:anchor-type="char" svg:width="8.652cm" svg:height="11.721cm" draw:z-index="13"><draw:image xlink:href="Pictures/1000000000000147000001BBF358449EB773140B.png" xlink:type="simple" xlink:show="embed" xlink:actuate="onLoad" draw:mime-type="image/png"/></draw:frame></text:p>
      <text:p text:style-name="P9"><text:soft-page-break/>13) Voir schématique complète dans le fichier <text:span text:style-name="T4">Schématique_TP2.png</text:span></text:p>
      <text:p text:style-name="P11">Les IBUF clk_IBUF_inst et restart_IBUF_inst sont les ports pour les deux signaux d’entrée de notre design (<text:span text:style-name="T4">clk</text:span> et <text:span text:style-name="T4">restart</text:span>).</text:p>
      <text:p text:style-name="P11">Le BUFG clk_IBUF_BUFG_inst est un buffer pour le signal d’horloge <text:span text:style-name="T4">clk</text:span>.</text:p>
      <text:p text:style-name="P9">Les FDCE Data_reg[0] à Data_reg [27] sont des bascules, chacune enregistrant un des bits du signal <text:span text:style-name="T4">Data</text:span>, et constituent ensemble<text:span text:style-name="T19">s</text:span> la partie stockage du registre « Compteur » sur le schéma RTL.</text:p>
      <text:p text:style-name="P34">Les LUT2 Data[<text:span text:style-name="T4">X</text:span>]_i_<text:span text:style-name="T4">x</text:span> et les CARRY4 Data_reg[<text:span text:style-name="T8">X</text:span>]_i<text:span text:style-name="T19">_1 </text:span>effectue<text:span text:style-name="T19">nt</text:span> ensemble<text:span text:style-name="T19">s</text:span> les opération (multiplexeur et incrémentation) avant la mise à jour des données du registre « Compteur », sur des séries de 4 bits.</text:p>
      <text:p text:style-name="P33">Plus précisément, les LUT2 effectuent la réinitialisation des données lorsque la cible a été atteinte et le lancement de l’incrémentation pour le dernier bit, alors que les CARRY4 propagent cette incrémentation de bit en bit.</text:p>
      <text:p text:style-name="P15"><text:span text:style-name="T13">Les LUT4 et LUT6 end_counter_OBUF_inst_i_</text:span><text:span text:style-name="T7">x</text:span><text:span text:style-name="T13"> (</text:span><text:span text:style-name="T7">x</text:span><text:span text:style-name="T13"> allant de 2 à 7) effectuent sur 4 ou 6 bits à la fois la comparaison du signal </text:span><text:span text:style-name="T7">Data</text:span><text:span text:style-name="T13"> avec la cible </text:span>X"BEBC200", <text:span text:style-name="T18">avant de faire la comparaison final dans le LUT6 end_counter_OBUF_inst_i_1 qui permet de créer le signal </text:span><text:span text:style-name="T7">r_cible.</text:span></text:p>
      <text:p text:style-name="P9">Le FDCE old_r_cible_reg est une bascule stockant le bit de donnée du registre « Mémoire <text:span text:style-name="T4">r_cible </text:span>» du schéma RTL.</text:p>
      <text:p text:style-name="P10">Le LUT3 led_in_i<text:span text:style-name="T29">_1</text:span> <text:span text:style-name="T19">combine les actions du comparateur et du multiplexeur pour fournir la donnée mise à jour en entrée du registre « Mémoire </text:span><text:span text:style-name="T8">led_in</text:span><text:span text:style-name="T19"> » </text:span>du schéma RTL.</text:p>
      <text:p text:style-name="P11">Le FDCE led_in_reg est une bascule stockant le<text:span text:style-name="T18"> bit de donnée du registre</text:span> « Mémoire <text:span text:style-name="T4">led_in</text:span> » <text:span text:style-name="T18">du schéma RTL.</text:span></text:p>
      <text:p text:style-name="P11">Les OBUF clk_IBUF_BUFG_inst et led_OBUF_inst sont les ports pour les deux signaux de sortie de notre design (<text:span text:style-name="T4">end_counter </text:span>et <text:span text:style-name="T4">led)</text:span>.</text:p>
      <text:p text:style-name="P11"/>
      <text:p text:style-name="P11">14) Voici les ressources utilisées d’après notre rapport de synthèse <text:span text:style-name="T27">(voir aussi le rapport complet dans le fichier </text:span><text:span text:style-name="T9">counter_unit.vds</text:span><text:span text:style-name="T27">) </text:span> :</text:p>
      <text:p text:style-name="P11"><draw:frame draw:style-name="fr6" draw:name="Image9" text:anchor-type="char" svg:y="0.224cm" svg:width="5.001cm" svg:height="6.482cm" draw:z-index="10"><draw:image xlink:href="Pictures/10000000000000BD000000F552A138FCE8F586A1.png" xlink:type="simple" xlink:show="embed" xlink:actuate="onLoad" draw:mime-type="image/png"/></draw:frame></text:p>
      <text:p text:style-name="P29">Par rapport à notre schéma RTL :</text:p>
      <text:list text:style-name="L7">
        <text:list-item>
          <text:p text:style-name="P27">Notre schéma comporte deux entrées, dont une horloge <text:span text:style-name="T21">→ </text:span><text:span text:style-name="T20">cela correspond aux ressources d’entrée annoncées, </text:span><text:span text:style-name="T26">2 entrées IBUF</text:span><text:span text:style-name="T20"> et </text:span><text:span text:style-name="T25">1 horloge BUFG</text:span><text:span text:style-name="T20">.</text:span></text:p>
        </text:list-item>
        <text:list-item>
          <text:p text:style-name="P26">Notre schéma comporte deux sorties <text:span text:style-name="T21">→ </text:span><text:span text:style-name="T20">cela correspond aux ressources de sortie annoncées, </text:span><text:span text:style-name="T25">2 <text:s/>OBUF</text:span><text:span text:style-name="T20">.</text:span></text:p>
        </text:list-item>
        <text:list-item>
          <text:p text:style-name="P27">Notre schéma contient 3 registres, de respectivement 28 bits, 1 bit et 1 bit, pour un total de 30 bits <text:span text:style-name="T21">→</text:span><text:span text:style-name="T20">cela correspond aux ressources de mémoires, les </text:span><text:span text:style-name="T25">30 FDCE</text:span><text:span text:style-name="T20"> annoncés.</text:span></text:p>
        </text:list-item>
        <text:list-item>
          <text:p text:style-name="P42">Pour l’entrée des données du registre « Compteur », <text:s/>notre schéma RTL prévoit :</text:p>
          <text:list>
            <text:list-item>
              <text:p text:style-name="P42">Une incrémentation qui nécessite d’inverser l’état du dernier bit, et propager si besoin (c’est à dire si la valeur initial du dernier bit était ‘1’) la retenue bit-à-bit sur les 27 bits. Cela nécessite donc une table de vérité à une entrée (LUT1) pour inverser le dernier bit, et de propager une retenue sur 28 bits (soit utiliser 7 CARRY4).</text:p>
            </text:list-item>
            <text:list-item>
              <text:p text:style-name="P41"><text:span text:style-name="T23">Un multiplexeur avec une des entrée variable à 28 bits </text:span><text:span text:style-name="T22">(sortie de l’incrémenteur)</text:span><text:span text:style-name="T23">, l’autre entrée fixe </text:span><text:span text:style-name="T22">(à </text:span>X"0000001"<text:span text:style-name="T27">)</text:span><text:span text:style-name="T23">, et une commande sur 1 bit. Pour chaque bit, cela correspond à un table de vérité à 2 entrée</text:span><text:span text:style-name="T24">s</text:span><text:span text:style-name="T23"> (la valeur du bit en entrée et la valeur du bit de commande), </text:span><text:span text:style-name="T22">soit 28 LUT2</text:span><text:span text:style-name="T23">.</text:span></text:p>
            </text:list-item>
          </text:list>
          <text:p text:style-name="P43">Selon cette description, nous avons besoin au total pour cette sous-partie de 1 LUT1, 28 LUT2 et 7 CARRY4.</text:p>
          <text:p text:style-name="P45"><text:span text:style-name="T27">On peut remarquer que ce cheminement logique « incrémenter OU réinitialiser à 1 » est équivalent à « (réinitialiser à 0 OU rien) PUIS incrémenter ».</text:span></text:p>
          <text:p text:style-name="P44"><text:span text:style-name="T27">Cela revient à :</text:span></text:p>
          <text:list text:continue-numbering="true">
            <text:list-item>
              <text:p text:style-name="P49">Pour le dernier bit, éventuellement (si reset) le placer à ‘0’, puis dans tous les cas l’inverser. Cela <text:span text:style-name="T29">se traduit par</text:span> une simple table de vérité à 2 entrées (LUT2)</text:p>
            </text:list-item>
          </text:list>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17">r_cible</text:p>
          </table:table-cell>
          <table:table-cell table:style-name="Tableau1.A1" office:value-type="string">
            <text:p text:style-name="P17">Data<text:span text:style-name="T11">[0]</text:span></text:p>
          </table:table-cell>
          <table:table-cell table:style-name="Tableau1.C1" office:value-type="string">
            <text:p text:style-name="P17">NewData<text:span text:style-name="T11">[0]</text:span></text:p>
          </table:table-cell>
        </table:table-row>
        <table:table-row>
          <table:table-cell table:style-name="Tableau1.A2" office:value-type="string">
            <text:p text:style-name="P16">0</text:p>
          </table:table-cell>
          <table:table-cell table:style-name="Tableau1.A2" office:value-type="string">
            <text:p text:style-name="P16">0</text:p>
          </table:table-cell>
          <table:table-cell table:style-name="Tableau1.C2" office:value-type="string">
            <text:p text:style-name="P16">1</text:p>
          </table:table-cell>
        </table:table-row>
        <table:table-row>
          <table:table-cell table:style-name="Tableau1.A2" office:value-type="string">
            <text:p text:style-name="P16">0</text:p>
          </table:table-cell>
          <table:table-cell table:style-name="Tableau1.A2" office:value-type="string">
            <text:p text:style-name="P16">1</text:p>
          </table:table-cell>
          <table:table-cell table:style-name="Tableau1.C2" office:value-type="string">
            <text:p text:style-name="P16">0</text:p>
          </table:table-cell>
        </table:table-row>
        <table:table-row>
          <table:table-cell table:style-name="Tableau1.A2" office:value-type="string">
            <text:p text:style-name="P16">1</text:p>
          </table:table-cell>
          <table:table-cell table:style-name="Tableau1.A2" office:value-type="string">
            <text:p text:style-name="P16">0</text:p>
          </table:table-cell>
          <table:table-cell table:style-name="Tableau1.C2" office:value-type="string">
            <text:p text:style-name="P16">1</text:p>
          </table:table-cell>
        </table:table-row>
        <table:table-row>
          <table:table-cell table:style-name="Tableau1.A2" office:value-type="string">
            <text:p text:style-name="P16">1</text:p>
          </table:table-cell>
          <table:table-cell table:style-name="Tableau1.A2" office:value-type="string">
            <text:p text:style-name="P16">1</text:p>
          </table:table-cell>
          <table:table-cell table:style-name="Tableau1.C2" office:value-type="string">
            <text:p text:style-name="P16">1</text:p>
          </table:table-cell>
        </table:table-row>
      </table:table>
      <text:list text:continue-numbering="true" text:style-name="L7">
        <text:list-item>
          <text:list>
            <text:list-header>
              <text:p text:style-name="P50"><text:soft-page-break/>Il faut aussi gérer le déclenchement de la retenue qui se propagera sur les bits supérieur<text:span text:style-name="T29">s</text:span>.</text:p>
              <text:p text:style-name="P50">À première vu, on veut que la retenue ne se déclenche que lorsque le dernier bit valait ‘1’ et qu’il n’y a pas de reset, ce qui correspond à la table de vérité opposée à la précédente.</text:p>
              <text:p text:style-name="P49">Cependant, en observant le fonctionnement exact de la primitive CARRY4, on remarque qu’une retenue indiquée fournie sur l’entrée D[0] aura un effet seulement si le bit d’entrée S[0] vaut ‘0’.</text:p>
              <text:p text:style-name="P49"><draw:frame draw:style-name="fr5" draw:name="Image10" text:anchor-type="paragraph" svg:x="4.882cm" svg:y="-0.078cm" svg:width="7.235cm" svg:height="11.248cm" draw:z-index="12"><draw:image xlink:href="Pictures/100000010000017700000247C491A0A3A876B071.png" xlink:type="simple" xlink:show="embed" xlink:actuate="onLoad" draw:mime-type="image/png"/></draw:frame>Cela veut dire que si on fourni sur S[0] le résultat de la table de vérité précédente (<text:span text:style-name="T4">NewData[0])</text:span>, l’entrée de retenue D[0] ne sera impliquée que dans le cas « <text:span text:style-name="T4">r_cible</text:span>=0 et <text:span text:style-name="T4">Data</text:span>[0]=1 ». La valeur de D[0] n’a donc aucune importance lorsque « <text:span text:style-name="T4">r_cible</text:span>=1 », et on peut piloter D[0] dans le cas « <text:span text:style-name="T4">r_cible</text:span>=0 » en prenant directement la valeur de <text:span text:style-name="T4">Data</text:span>[0], et en évitant une table de vérité supplémentaire.</text:p>
            </text:list-header>
            <text:list-item>
              <text:p text:style-name="P46">Pour les 27 autres bits, on applique l’éventuel reset à ‘0’, puis on propage l’éventuel retenue venant du bit inférieur. Cela correspond à une LUT2, puis le passage dans un CARRY4.</text:p>
            </text:list-item>
          </text:list>
          <text:p text:style-name="P46">Au total, cela demande une LUT2 par bit, soit 28 au total, et 7 CARRY4 (pour propager la retenue sur 4*7=28 bits).</text:p>
          <text:p text:style-name="P46">On observera qu’en pratique, le schéma de synthèse retient cette seconde méthode, avec 28 LUT2 en entrée des 7 CARRY4, mais en rajoutant une LUT2 supplémentaire pour piloter l’entrée de retenue sur le dernier bit, l’entrée D[0] sur le CARRY4 correspondant. Comme expliqué précédemment, je pense que cette LUT est superflue.</text:p>
          <text:p text:style-name="P46">Au total, notre synthèse utilise donc <text:span text:style-name="T28">29 LUT2</text:span> et <text:span text:style-name="T28">7 CARRY4</text:span> pour ce sous-bloc.</text:p>
        </text:list-item>
        <text:list-item>
          <text:p text:style-name="P47"><text:soft-page-break/>Sur notre schéma RTL, on obtient <text:span text:style-name="T4">r_cible en</text:span> comparant les 28 bits de D<text:span text:style-name="T4">ata</text:span> à une valeur fixe de 28 bits. Cette comparaison correspond donc à une table de vérité à 28 entrées.</text:p>
          <text:p text:style-name="P46">Lors de la synthèse, obtenir directement une table de vérité à 28 entrées est impossible. En pratique, notre synthèse utilise pour cette opération dans un premier temps 2 LUT6 et 4 LUT4, qu’elle recombine ensuite dans une dernière LUT6. Cela représente au total <text:span text:style-name="T28">4 LUT4</text:span> et <text:span text:style-name="T28">3 LUT6</text:span>.</text:p>
          <text:p text:style-name="P46">En revanche, je ne suis pas sûre de comprendre pourquoi la synthèse n’a pas économisé une LUT, en faisant la comparaison sur 4 LUT6 et 1 LUT4, puis la combinaison sur 1 LUT5, pour un total de 6 LUT (au lieu des 7 de la synthèse).</text:p>
        </text:list-item>
        <text:list-item>
          <text:p text:style-name="P47">Pour l’entrée du registre « Mémoire <text:span text:style-name="T4">led_in </text:span>» du schéma RTL, les trois composants (comparaison, inverseur et multiplexeur) peuvent se résumer à une table de vérité à trois entrées : les signaux<text:span text:style-name="T4"> r_cible</text:span>,<text:span text:style-name="T4"> old_r_cible</text:span> et<text:span text:style-name="T4"> led_in</text:span>.</text:p>
          <text:p text:style-name="P48">Dans notre synthèse, cette logique est contenue dans <text:span text:style-name="T28">1 LUT3</text:span>.</text:p>
        </text:list-item>
      </text:list>
      <text:p text:style-name="P55"><text:span text:style-name="T29">D</text:span>ans les ressources listées dans le rapport, ous retrouvons donc bien l’ensemble de la logique décrite dans notre schéma RTL.</text:p>
      <text:p text:style-name="P51"/>
      <text:p text:style-name="P51">15) Mise en place dans l’onglet « Set Up Debug » de Vivado de trois sondes ILA de débug, sur les nets :</text:p>
      <text:list text:style-name="L9">
        <text:list-item>
          <text:p text:style-name="P52">end_counter_OBUF (juste avant le port de sortie <text:span text:style-name="T4">end_counter</text:span>) ;</text:p>
        </text:list-item>
        <text:list-item>
          <text:p text:style-name="P52">led_OBUF (juste avant le port de sortie <text:span text:style-name="T4">led</text:span>) ;</text:p>
        </text:list-item>
        <text:list-item>
          <text:p text:style-name="P52">restart_IBUF (juste après l’entrée <text:span text:style-name="T4">restart</text:span>)</text:p>
        </text:list-item>
      </text:list>
      <text:p text:style-name="P51"/>
      <text:p text:style-name="P51">16) Analyse du rapport de timing après implémentation (voir aussi le rapport complet dans le fichier <text:span text:style-name="T4">counter_unit_timing_summary_routed.rpt</text:span>).</text:p>
      <text:p text:style-name="P51"/>
      <text:p text:style-name="P51">Le récapitulatif de timing obtenu est le suivant :</text:p>
      <text:p text:style-name="P51"><draw:frame draw:style-name="fr3" draw:name="Image11" text:anchor-type="char" svg:width="17cm" svg:height="1.861cm" draw:z-index="14"><draw:image xlink:href="Pictures/10000000000005E2000000A5DC33192A54F59C80.png" xlink:type="simple" xlink:show="embed" xlink:actuate="onLoad" draw:mime-type="image/png"/></draw:frame>On observe notamment que les valeurs de <text:span text:style-name="T4">Total Negative Slack (TNS)</text:span> et de <text:span text:style-name="T4">Total Hold Slack (THS)</text:span> valent bien 0 ns, ce qui indique qu’<text:span text:style-name="T28">il n’y a ni violation de set up</text:span>, <text:span text:style-name="T28">ni violation de hold</text:span>.</text:p>
      <text:p text:style-name="P51"/>
      <text:p text:style-name="P51">Le récapitulatif d’horloge est le suivant :</text:p>
      <text:p text:style-name="P51"><draw:frame draw:style-name="fr3" draw:name="Image12" text:anchor-type="char" svg:width="17cm" svg:height="2.697cm" draw:z-index="15"><draw:image xlink:href="Pictures/10000000000003EA0000009F9444FF711B9879FC.png" xlink:type="simple" xlink:show="embed" xlink:actuate="onLoad" draw:mime-type="image/png"/></draw:frame><text:soft-page-break/>L’horloge système <text:span text:style-name="T4">sys_clk_pin</text:span> est bien configurée selon nos spécifications initiales : période de 10 ns (soit une fréquence de 100 MHz), et signal carré (même demi-période de 5 ns pour les crêtes haute et basse du signal).</text:p>
      <text:p text:style-name="P51"/>
      <text:p text:style-name="P51">Le chemin critique présenté par le rapport est le suivant :</text:p>
      <text:p text:style-name="P51"><draw:frame draw:style-name="fr3" draw:name="Image13" text:anchor-type="char" svg:width="17cm" svg:height="6.881cm" draw:z-index="16"><draw:image xlink:href="Pictures/100000000000039200000172B243C3CBA51D3402.png" xlink:type="simple" xlink:show="embed" xlink:actuate="onLoad" draw:mime-type="image/png"/></draw:frame>On remarque que le slack de ce chemin critique est à environ 40 % d’une période, ce qui est relativement large.</text:p>
      <text:p text:style-name="P51"/>
      <text:p text:style-name="P51">17) Le Bitstream est généré, et utilisé pour programmer la carte.</text:p>
      <text:p text:style-name="P51"/>
      <text:p text:style-name="P51">La vidéo <text:span text:style-name="T4">Démo_compteur.mp4</text:span> présente 16 secondes de fonctionnement de la carte.</text:p>
      <text:p text:style-name="P51">Les 6 premières secondes de viédo présentent le fonctionnement normal de la carte, et on observe bien la LED clignoter (cycle de 2 secondes allumée, 2 secondes éteinte).</text:p>
      <text:p text:style-name="P51">Autour de la 6ème seconde de vidéo, je presse le bouton <text:span text:style-name="T4">restart</text:span> alors que la LED est allumée : la LED s’éteint immédiatement et reste éteinte tant que le bouton est pressé.</text:p>
      <text:p text:style-name="P51">Le bouton est relâché autour de la 9ème seconde de vidéo, et le fonctionnement normal reprends à partir de là jusqu’à la fin de la vidéo, en commençant par 2 secondes supplémentaires ou la LED reste éteinte.</text:p>
      <text:p text:style-name="P51"/>
      <text:p text:style-name="P51">Plusieurs tests sont effectués avec la ILA :</text:p>
      <text:list text:style-name="L10">
        <text:list-item>
          <text:p text:style-name="P53">En mettant un trigger sur le front montant du signal <text:span text:style-name="T4">led</text:span>, on détecte en fonctionnement normal :</text:p>
          <text:p text:style-name="P54"><draw:frame draw:style-name="fr1" draw:name="Image14" text:anchor-type="char" svg:width="16.365cm" svg:height="1.122cm" draw:z-index="17"><draw:image xlink:href="Pictures/1000000000000757000000811124888CEC91684B.png" xlink:type="simple" xlink:show="embed" xlink:actuate="onLoad" draw:mime-type="image/png"/></draw:frame><text:soft-page-break/>On observe bien juste avant le trigger le pic du signal <text:span text:style-name="T4">end_counter</text:span>, <text:span text:style-name="T29">qui indique que la bascule de la LED a été provoquée par une fin de compteur</text:span>.</text:p>
        </text:list-item>
        <text:list-item>
          <text:p text:style-name="P53">De même, en mettant en fonctionnement normal un trigger sur le front descendant du signal <text:span text:style-name="T4">led</text:span>, on détecte :</text:p>
          <text:p text:style-name="P54"><draw:frame draw:style-name="fr1" draw:name="Image15" text:anchor-type="char" svg:width="16.365cm" svg:height="1.166cm" draw:z-index="18"><draw:image xlink:href="Pictures/1000000000000757000000864A18890D8F6EFA50.png" xlink:type="simple" xlink:show="embed" xlink:actuate="onLoad" draw:mime-type="image/png"/></draw:frame>On observe encore une fois juste avant le trigger le pic du signal <text:span text:style-name="T4">end_counter</text:span>.</text:p>
        </text:list-item>
        <text:list-item>
          <text:p text:style-name="P53">Inversement, en fonctionnement normal, en mettant un trigger sur un changement d’état du signal <text:span text:style-name="T4">end_counter</text:span>, on détecte :</text:p>
          <text:p text:style-name="P54"><draw:frame draw:style-name="fr2" draw:name="Image16" text:anchor-type="char" svg:x="0.318cm" svg:y="0cm" svg:width="16.365cm" svg:height="1.132cm" draw:z-index="19"><draw:image xlink:href="Pictures/100000000000075400000082A7B9E7542BD8468D.png" xlink:type="simple" xlink:show="embed" xlink:actuate="onLoad" draw:mime-type="image/png"/></draw:frame>Dans ce cas, le pic de <text:span text:style-name="T4">end_counter</text:span> a provoqué un passage de <text:span text:style-name="T4">led</text:span> du haut vers le bas.</text:p>
        </text:list-item>
        <text:list-item>
          <text:p text:style-name="P53">Enfin, en plaçant un trigger sur le front montant du signal <text:span text:style-name="T4">res</text:span><text:span text:style-name="T10">t</text:span><text:span text:style-name="T4">art</text:span>, puis en appuyant sur le bouton alors que la LED est allumée, on obtient :</text:p>
          <text:p text:style-name="P53"><draw:frame draw:style-name="fr1" draw:name="Image17" text:anchor-type="char" svg:width="16.365cm" svg:height="1.166cm" draw:z-index="20"><draw:image xlink:href="Pictures/100000000000075800000086E7F160A53D3106B9.png" xlink:type="simple" xlink:show="embed" xlink:actuate="onLoad" draw:mime-type="image/png"/></draw:frame>On observe bien le signal <text:span text:style-name="T4">restart</text:span> provoquer la mise à ‘0’ du signal <text:span text:style-name="T4">led</text:span>, sans voir de pic sur <text:span text:style-name="T4">end_counter</text:span>.</text:p>
        </text:list-item>
      </text:list>
      <text:p text:style-name="P56"/>
      <text:p text:style-name="P56">Que ce soit en visuel ou via l’ILA, la carte semble fonctionner parfaitement.</text:p>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09208b"/>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7-03T14:52:52.714000000</meta:creation-date>
    <dc:date>2026-07-08T13:59:19.405000000</dc:date>
    <meta:editing-duration>P1DT3H40M15S</meta:editing-duration>
    <meta:editing-cycles>7</meta:editing-cycles>
    <meta:generator>LibreOffice/7.5.8.2$Windows_X86_64 LibreOffice_project/f718d63693263970429a68f568db6046aaa9df01</meta:generator>
    <meta:document-statistic meta:table-count="1" meta:image-count="17" meta:object-count="4" meta:page-count="14" meta:paragraph-count="155" meta:word-count="3281" meta:character-count="18545" meta:non-whitespace-character-count="15466"/>
  </office:meta>
</office:document-meta>
</file>

<file path=Object 1/content.xml><?xml version="1.0" encoding="utf-8"?>
<math xmlns="http://www.w3.org/1998/Math/MathML" display="block">
  <semantics>
    <mrow>
      <mrow>
        <msub>
          <mi>T</mi>
          <mi mathvariant="italic">clk</mi>
        </msub>
        <mo stretchy="false">=</mo>
        <mfrac>
          <mn>1</mn>
          <msub>
            <mi>f</mi>
            <mi mathvariant="italic">clk</mi>
          </msub>
        </mfrac>
        <mo stretchy="false">=</mo>
        <mfrac>
          <mn>1</mn>
          <mrow>
            <mn>100</mn>
            <mi mathvariant="italic">MHz</mi>
          </mrow>
        </mfrac>
        <mo stretchy="false">=</mo>
        <mn>10</mn>
      </mrow>
      <mi mathvariant="italic">ns</mi>
    </mrow>
    <annotation encoding="StarMath 5.0">T_clk = frac {1} {f_clk} = frac { 1 } { 100 MHz } = 10 ns</annotation>
  </semantics>
</math>
</file>

<file path=Object 2/content.xml><?xml version="1.0" encoding="utf-8"?>
<math xmlns="http://www.w3.org/1998/Math/MathML" display="block">
  <semantics>
    <mrow>
      <mrow>
        <msub>
          <mi>f</mi>
          <mi mathvariant="italic">clk</mi>
        </msub>
        <mo stretchy="false">=</mo>
        <mn>100</mn>
      </mrow>
      <mi mathvariant="italic">MHz</mi>
    </mrow>
    <annotation encoding="StarMath 5.0">f_clk = 100 MHz</annotation>
  </semantics>
</math>
</file>

<file path=Object 3/content.xml><?xml version="1.0" encoding="utf-8"?>
<math xmlns="http://www.w3.org/1998/Math/MathML" display="block">
  <semantics>
    <mrow>
      <mrow>
        <mi>N</mi>
        <mo stretchy="false">=</mo>
        <mfrac>
          <mrow>
            <mn>2</mn>
            <mi>s</mi>
          </mrow>
          <msub>
            <mi>T</mi>
            <mi mathvariant="italic">clk</mi>
          </msub>
        </mfrac>
        <mo stretchy="false">=</mo>
        <mfrac>
          <mrow>
            <mn>2</mn>
            <mi>s</mi>
          </mrow>
          <mrow>
            <mn>10</mn>
            <mi mathvariant="italic">ns</mi>
          </mrow>
        </mfrac>
        <mo stretchy="false">=</mo>
        <mn>200</mn>
      </mrow>
      <mn>000</mn>
      <mn>000</mn>
    </mrow>
    <annotation encoding="StarMath 5.0">N=frac { 2s } { T_clk } = frac { 2s } { 10ns } = 200 000 000</annotation>
  </semantics>
</math>
</file>

<file path=Object 4/content.xml><?xml version="1.0" encoding="utf-8"?>
<math xmlns="http://www.w3.org/1998/Math/MathML" display="block">
  <semantics>
    <mrow>
      <msub>
        <mi>log</mi>
        <mn>2</mn>
      </msub>
      <mrow>
        <mrow>
          <mo fence="true" form="prefix" stretchy="false">(</mo>
          <mrow>
            <mi>N</mi>
          </mrow>
          <mo fence="true" form="postfix" stretchy="false">)</mo>
        </mrow>
        <mo stretchy="false">=</mo>
        <mn>27,575</mn>
      </mrow>
    </mrow>
    <annotation encoding="StarMath 5.0">log_2(N) = 27,575</annotation>
  </semantics>
</math>
</file>